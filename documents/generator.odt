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33f" officeooo:paragraph-rsid="0006033f"/>
    </style:style>
    <style:style style:name="P2" style:family="paragraph" style:parent-style-name="Standard">
      <style:paragraph-properties fo:break-before="page"/>
      <style:text-properties officeooo:rsid="0006033f" officeooo:paragraph-rsid="0006033f"/>
    </style:style>
    <style:style style:name="P3" style:family="paragraph" style:parent-style-name="Standard">
      <style:text-properties officeooo:rsid="00080f35" officeooo:paragraph-rsid="00080f35"/>
    </style:style>
    <style:style style:name="T1" style:family="text">
      <style:text-properties officeooo:rsid="000727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RIX BASED KEYPAD <text:span text:style-name="T1">DTMF TONE</text:span> GENERATOR</text:p>
      <text:p text:style-name="P1"/>
      <text:p text:style-name="P1">This is divided into 3 sections audio.v topmodule.v and buttons.v</text:p>
      <text:p text:style-name="P1"/>
      <text:p text:style-name="P1">AUDIO.V</text:p>
      <text:p text:style-name="P1">module audio(</text:p>
      <text:p text:style-name="P1"><text:s text:c="4"/>input clk,</text:p>
      <text:p text:style-name="P1"><text:s text:c="4"/>input [4:0] key,</text:p>
      <text:p text:style-name="P1"><text:s text:c="4"/>output reg audio_l,audio_r</text:p>
      <text:p text:style-name="P1"/>
      <text:p text:style-name="P1"><text:s text:c="4"/>);</text:p>
      <text:p text:style-name="P1"/>
      <text:p text:style-name="P1">// reg [4:0] key;</text:p>
      <text:p text:style-name="P1">// always @(*) begin</text:p>
      <text:p text:style-name="P1">// <text:s text:c="4"/>key &lt;= 5'd1;</text:p>
      <text:p text:style-name="P1">// end</text:p>
      <text:p text:style-name="P1"/>
      <text:p text:style-name="P1"/>
      <text:p text:style-name="P1">parameter clkfreq=12000000; </text:p>
      <text:p text:style-name="P1"/>
      <text:p text:style-name="P1">reg [15:0] freq_r ;</text:p>
      <text:p text:style-name="P1">reg [15:0] freq_c ;</text:p>
      <text:p text:style-name="P1">wire key_pressed = (key &gt;= 5'd1 &amp;&amp; key &lt;= 5'd16);</text:p>
      <text:p text:style-name="P1">wire [31:0] phase_inc_r;</text:p>
      <text:p text:style-name="P1">wire [31:0] phase_inc_c;</text:p>
      <text:p text:style-name="P1">assign phase_inc_r = freq_r * 358; //freq*2**32/clock frequency</text:p>
      <text:p text:style-name="P1">assign phase_inc_c = freq_c * 358;</text:p>
      <text:p text:style-name="P1"/>
      <text:p text:style-name="P1">always @(*) begin</text:p>
      <text:p text:style-name="P1"><text:s text:c="4"/>case (key)</text:p>
      <text:p text:style-name="P1">5'd1,5'd2,5'd3 : freq_r = 697;</text:p>
      <text:p text:style-name="P1">5'd4,5'd5,5'd6 : freq_r = 770;</text:p>
      <text:p text:style-name="P1">5'd7,5'd8,5'd9 : freq_r = 852;</text:p>
      <text:p text:style-name="P1"/>
      <text:p text:style-name="P1"><text:s text:c="8"/>default: freq_r = 0;</text:p>
      <text:p text:style-name="P1"><text:s text:c="4"/>endcase</text:p>
      <text:p text:style-name="P1">end</text:p>
      <text:p text:style-name="P1"/>
      <text:p text:style-name="P1">always @(*) begin</text:p>
      <text:p text:style-name="P1"><text:s text:c="4"/>case (key)</text:p>
      <text:p text:style-name="P1">5'd1,5'd4,5'd7 : freq_c = 1209;</text:p>
      <text:p text:style-name="P1">5'd2,5'd5,5'd8 : freq_c = 1336;</text:p>
      <text:p text:style-name="P1">5'd3,5'd6,5'd9 : freq_c = 1477;</text:p>
      <text:p text:style-name="P1"/>
      <text:p text:style-name="P1"><text:s text:c="8"/>default: freq_c = 0;</text:p>
      <text:p text:style-name="P1"><text:s text:c="4"/>endcase</text:p>
      <text:p text:style-name="P1">end</text:p>
      <text:p text:style-name="P1"/>
      <text:p text:style-name="P1"/>
      <text:p text:style-name="P1">reg <text:s/>signed [15:0] sine_out_r;</text:p>
      <text:p text:style-name="P1">reg [31:0] counter_r;</text:p>
      <text:p text:style-name="P1">wire [7:0] addr_r;</text:p>
      <text:p text:style-name="P1"><text:soft-page-break/></text:p>
      <text:p text:style-name="P1">reg <text:s/>signed [15:0] sine_out_c;</text:p>
      <text:p text:style-name="P1">reg [31:0] counter_c;</text:p>
      <text:p text:style-name="P1">wire [7:0] addr_c;</text:p>
      <text:p text:style-name="P1"/>
      <text:p text:style-name="P1">assign addr_r = counter_r[31:24];</text:p>
      <text:p text:style-name="P1">assign addr_c = counter_c[31:24];</text:p>
      <text:p text:style-name="P1">always @(posedge clk) begin</text:p>
      <text:p text:style-name="P1"><text:s text:c="4"/>if (key_pressed) begin</text:p>
      <text:p text:style-name="P1"><text:s text:c="8"/>counter_r &lt;= counter_r + phase_inc_r;</text:p>
      <text:p text:style-name="P1"><text:s text:c="8"/>counter_c &lt;= counter_c + phase_inc_c;</text:p>
      <text:p text:style-name="P1"><text:s text:c="4"/>end else begin</text:p>
      <text:p text:style-name="P1"><text:s text:c="8"/>counter_r &lt;= 32'd0; </text:p>
      <text:p text:style-name="P1"><text:s text:c="8"/>counter_c &lt;= 32'd0; </text:p>
      <text:p text:style-name="P1"><text:s text:c="4"/>end</text:p>
      <text:p text:style-name="P1">end</text:p>
      <text:p text:style-name="P1"/>
      <text:p text:style-name="P1">wire [15:0] sample_r= sine_out_r + 16'd32768;</text:p>
      <text:p text:style-name="P1">wire [15:0] sample_c= sine_out_c + 16'd32768;</text:p>
      <text:p text:style-name="P1">wire [16:0] mixer= sample_r + sample_c;</text:p>
      <text:p text:style-name="P1"/>
      <text:p text:style-name="P1"/>
      <text:p text:style-name="P1">reg [17:0] acc = 0;</text:p>
      <text:p text:style-name="P1">always @(posedge clk) begin</text:p>
      <text:p text:style-name="P1"><text:s text:c="4"/>if (key_pressed) begin</text:p>
      <text:p text:style-name="P1"><text:s text:c="6"/></text:p>
      <text:p text:style-name="P1">acc &lt;= {1'b0, acc[16:0]} + mixer;</text:p>
      <text:p text:style-name="P1"><text:s text:c="4"/>end else begin</text:p>
      <text:p text:style-name="P1"/>
      <text:p text:style-name="P1"><text:s text:c="8"/>acc &lt;= 18'd0;</text:p>
      <text:p text:style-name="P1"><text:s text:c="4"/>end</text:p>
      <text:p text:style-name="P1">end</text:p>
      <text:p text:style-name="P1">always @(posedge clk) begin</text:p>
      <text:p text:style-name="P1"><text:s text:c="4"/>if(key_pressed) begin</text:p>
      <text:p text:style-name="P1"><text:s text:c="4"/>audio_l &lt;= acc[17];</text:p>
      <text:p text:style-name="P1"><text:s text:c="4"/>audio_r &lt;= acc[17];</text:p>
      <text:p text:style-name="P1"><text:s text:c="4"/>end else begin</text:p>
      <text:p text:style-name="P1"><text:s text:c="2"/>audio_l &lt;= 1'b0;</text:p>
      <text:p text:style-name="P1"><text:s text:c="2"/>audio_r &lt;= 1'b0;</text:p>
      <text:p text:style-name="P1"><text:s text:c="4"/>end</text:p>
      <text:p text:style-name="P1"/>
      <text:p text:style-name="P1">end</text:p>
      <text:p text:style-name="P1"/>
      <text:p text:style-name="P1">sinout sinout_r (</text:p>
      <text:p text:style-name="P1"><text:s text:c="4"/>.addr(addr_r),</text:p>
      <text:p text:style-name="P1"><text:s text:c="4"/>.sine_out(sine_out_r)</text:p>
      <text:p text:style-name="P1">);</text:p>
      <text:p text:style-name="P1">sinout sinout_c (</text:p>
      <text:p text:style-name="P1"><text:s text:c="4"/>.addr(addr_c),</text:p>
      <text:p text:style-name="P1"><text:s text:c="4"/>.sine_out(sine_out_c)</text:p>
      <text:p text:style-name="P1">);</text:p>
      <text:p text:style-name="P1"/>
      <text:p text:style-name="P1"><text:soft-page-break/></text:p>
      <text:p text:style-name="P1">endmodule</text:p>
      <text:p text:style-name="P1"/>
      <text:p text:style-name="P1"/>
      <text:p text:style-name="P1">BUTTONS.V</text:p>
      <text:p text:style-name="P1">module buttons (</text:p>
      <text:p text:style-name="P1"><text:s text:c="4"/>input clk,</text:p>
      <text:p text:style-name="P1"><text:s text:c="4"/>input r1, r2, r3,</text:p>
      <text:p text:style-name="P1"><text:s text:c="4"/>output reg c1, c2, c3,</text:p>
      <text:p text:style-name="P1"><text:s text:c="4"/>output reg [4:0] key,</text:p>
      <text:p text:style-name="P1"><text:s text:c="4"/>// output reg led_blue_n,</text:p>
      <text:p text:style-name="P1"><text:s text:c="4"/>// output reg led_amber_n,</text:p>
      <text:p text:style-name="P1"><text:s text:c="4"/>// output reg led_rgb_green_n</text:p>
      <text:p text:style-name="P1">);</text:p>
      <text:p text:style-name="P1"/>
      <text:p text:style-name="P1"/>
      <text:p text:style-name="P1"><text:s text:c="4"/>parameter STATE_SCAN_C1= 4'b0000, STATE_READ_C1= 4'b0001, STATE_READ_C1_WAIT = 4'b0010;</text:p>
      <text:p text:style-name="P1"><text:s text:c="4"/>parameter STATE_SCAN_C2= 4'b0011, STATE_READ_C2= 4'b0100, STATE_READ_C2_WAIT = 4'b0101;</text:p>
      <text:p text:style-name="P1"><text:s text:c="4"/>parameter STATE_SCAN_C3= 4'b0110, STATE_READ_C3= 4'b0111, STATE_READ_C3_WAIT = 4'b1000;</text:p>
      <text:p text:style-name="P1"><text:s text:c="4"/></text:p>
      <text:p text:style-name="P1"><text:s text:c="4"/>reg [3:0] curr_state = STATE_SCAN_C1;</text:p>
      <text:p text:style-name="P1"><text:s text:c="4"/>reg [3:0] next_state;</text:p>
      <text:p text:style-name="P1"><text:s text:c="4"/>reg [2:0] ff1, ff2;</text:p>
      <text:p text:style-name="P1"><text:s text:c="4"/>reg [8:0] det_key = 9'b000000000;</text:p>
      <text:p text:style-name="P1"/>
      <text:p text:style-name="P1"><text:s text:c="4"/>reg [22:0] clk_div = 0;</text:p>
      <text:p text:style-name="P1"><text:s text:c="4"/>always @(posedge clk) begin</text:p>
      <text:p text:style-name="P1"><text:s text:c="8"/>clk_div &lt;= clk_div + 1;</text:p>
      <text:p text:style-name="P1"><text:s text:c="4"/>end</text:p>
      <text:p text:style-name="P1"/>
      <text:p text:style-name="P1"><text:s text:c="4"/>wire scan_clk <text:s/>= clk_div[15];</text:p>
      <text:p text:style-name="P1"/>
      <text:p text:style-name="P1"><text:s text:c="4"/>wire [2:0] row = {r3, r2, r1}; </text:p>
      <text:p text:style-name="P1"/>
      <text:p text:style-name="P1"><text:s text:c="4"/>always @(posedge scan_clk) begin</text:p>
      <text:p text:style-name="P1"><text:s text:c="8"/>ff1 <text:s text:c="7"/>&lt;= row;</text:p>
      <text:p text:style-name="P1"><text:s text:c="8"/>ff2 <text:s text:c="7"/>&lt;= ff1;</text:p>
      <text:p text:style-name="P1"><text:s text:c="8"/>curr_state &lt;= next_state;</text:p>
      <text:p text:style-name="P1"><text:s text:c="4"/>end</text:p>
      <text:p text:style-name="P1"><text:s text:c="4"/>always @(posedge scan_clk) begin</text:p>
      <text:p text:style-name="P1"><text:s text:c="8"/>case (curr_state)</text:p>
      <text:p text:style-name="P1"><text:s text:c="12"/>STATE_READ_C1_WAIT: begin</text:p>
      <text:p text:style-name="P1"><text:s text:c="16"/>det_key[0] &lt;= ff2[0]; </text:p>
      <text:p text:style-name="P1"><text:s text:c="16"/>det_key[3] &lt;= ff2[1];</text:p>
      <text:p text:style-name="P1"><text:s text:c="16"/>det_key[6] &lt;= ff2[2];</text:p>
      <text:p text:style-name="P1"><text:s text:c="12"/>end</text:p>
      <text:p text:style-name="P1"><text:s text:c="12"/>STATE_READ_C2_WAIT: begin</text:p>
      <text:p text:style-name="P1"><text:s text:c="16"/>det_key[1] &lt;= ff2[0]; </text:p>
      <text:p text:style-name="P1"><text:s text:c="16"/>det_key[4] &lt;= ff2[1]; </text:p>
      <text:p text:style-name="P1"><text:soft-page-break/><text:s text:c="16"/>det_key[7] &lt;= ff2[2]; </text:p>
      <text:p text:style-name="P1"><text:s text:c="12"/>end</text:p>
      <text:p text:style-name="P1"><text:s text:c="12"/>STATE_READ_C3_WAIT: begin</text:p>
      <text:p text:style-name="P1"><text:s text:c="16"/>det_key[2] &lt;= ff2[0]; </text:p>
      <text:p text:style-name="P1"><text:s text:c="16"/>det_key[5] &lt;= ff2[1];</text:p>
      <text:p text:style-name="P1"><text:s text:c="16"/>det_key[8] &lt;= ff2[2];</text:p>
      <text:p text:style-name="P1"><text:s text:c="12"/>end</text:p>
      <text:p text:style-name="P1"><text:s text:c="8"/>endcase</text:p>
      <text:p text:style-name="P1"><text:s text:c="4"/>end</text:p>
      <text:p text:style-name="P1"/>
      <text:p text:style-name="P1"/>
      <text:p text:style-name="P1"><text:s text:c="4"/>always @(*) begin</text:p>
      <text:p text:style-name="P1"><text:s text:c="8"/>next_state = curr_state;</text:p>
      <text:p text:style-name="P1"><text:s text:c="8"/>c1 = 1'b0; c2 = 1'b0; c3 = 1'b0;</text:p>
      <text:p text:style-name="P1"/>
      <text:p text:style-name="P1"><text:s text:c="8"/>case(curr_state)</text:p>
      <text:p text:style-name="P1"><text:s text:c="12"/>STATE_SCAN_C1: begin</text:p>
      <text:p text:style-name="P1"><text:s text:c="16"/>c1 = 1'b1;</text:p>
      <text:p text:style-name="P1"><text:s text:c="16"/>next_state = STATE_READ_C1;</text:p>
      <text:p text:style-name="P1"><text:s text:c="12"/>end</text:p>
      <text:p text:style-name="P1"><text:s text:c="12"/>STATE_READ_C1: begin</text:p>
      <text:p text:style-name="P1"><text:s text:c="16"/>c1 = 1'b1;</text:p>
      <text:p text:style-name="P1"><text:s text:c="16"/>next_state = STATE_READ_C1_WAIT;</text:p>
      <text:p text:style-name="P1"><text:s text:c="12"/>end</text:p>
      <text:p text:style-name="P1"><text:s text:c="12"/>STATE_READ_C1_WAIT: begin</text:p>
      <text:p text:style-name="P1"><text:s text:c="16"/>c1 = 1'b1; </text:p>
      <text:p text:style-name="P1"><text:s text:c="16"/>next_state = STATE_SCAN_C2; </text:p>
      <text:p text:style-name="P1"><text:s text:c="12"/>end</text:p>
      <text:p text:style-name="P1"/>
      <text:p text:style-name="P1"><text:s text:c="12"/>STATE_SCAN_C2: begin</text:p>
      <text:p text:style-name="P1"><text:s text:c="16"/>c2 = 1'b1; </text:p>
      <text:p text:style-name="P1"><text:s text:c="16"/>next_state = STATE_READ_C2;</text:p>
      <text:p text:style-name="P1"><text:s text:c="12"/>end</text:p>
      <text:p text:style-name="P1"><text:s text:c="12"/>STATE_READ_C2: begin</text:p>
      <text:p text:style-name="P1"><text:s text:c="16"/>c2 = 1'b1; </text:p>
      <text:p text:style-name="P1"><text:s text:c="16"/>next_state = STATE_READ_C2_WAIT;</text:p>
      <text:p text:style-name="P1"><text:s text:c="12"/>end</text:p>
      <text:p text:style-name="P1"><text:s text:c="12"/>STATE_READ_C2_WAIT: begin</text:p>
      <text:p text:style-name="P1"><text:s text:c="16"/>c2 = 1'b1; </text:p>
      <text:p text:style-name="P1"><text:s text:c="16"/>next_state = STATE_SCAN_C3;</text:p>
      <text:p text:style-name="P1"><text:s text:c="12"/>end</text:p>
      <text:p text:style-name="P1"/>
      <text:p text:style-name="P1"><text:s text:c="12"/>STATE_SCAN_C3: begin</text:p>
      <text:p text:style-name="P1"><text:s text:c="16"/>c3 = 1'b1; </text:p>
      <text:p text:style-name="P1"><text:s text:c="16"/>next_state = STATE_READ_C3;</text:p>
      <text:p text:style-name="P1"><text:s text:c="12"/>end</text:p>
      <text:p text:style-name="P1"><text:s text:c="12"/>STATE_READ_C3: begin</text:p>
      <text:p text:style-name="P1"><text:s text:c="16"/>c3 = 1'b1;</text:p>
      <text:p text:style-name="P1"><text:s text:c="16"/>next_state = STATE_READ_C3_WAIT;</text:p>
      <text:p text:style-name="P1"><text:s text:c="12"/>end</text:p>
      <text:p text:style-name="P1"><text:s text:c="12"/>STATE_READ_C3_WAIT: begin</text:p>
      <text:p text:style-name="P1"><text:s text:c="16"/>c3 = 1'b1;</text:p>
      <text:p text:style-name="P1"><text:soft-page-break/><text:s text:c="16"/>next_state = STATE_SCAN_C1;</text:p>
      <text:p text:style-name="P1"><text:s text:c="12"/>end</text:p>
      <text:p text:style-name="P1"/>
      <text:p text:style-name="P1"><text:s text:c="12"/>default: next_state = STATE_SCAN_C1;</text:p>
      <text:p text:style-name="P1"><text:s text:c="8"/>endcase</text:p>
      <text:p text:style-name="P1"><text:s text:c="4"/>end</text:p>
      <text:p text:style-name="P1"/>
      <text:p text:style-name="P1">always @(*) begin</text:p>
      <text:p text:style-name="P1"><text:s text:c="8"/>case (det_key)</text:p>
      <text:p text:style-name="P1"/>
      <text:p text:style-name="P1"><text:s text:c="12"/>9'b000000001: begin </text:p>
      <text:p text:style-name="P1"><text:s text:c="16"/>key= 5'd1;</text:p>
      <text:p text:style-name="P1"><text:s text:c="12"/>end</text:p>
      <text:p text:style-name="P1"><text:s text:c="12"/>9'b000000010: begin </text:p>
      <text:p text:style-name="P1"><text:s text:c="16"/>key= 5'd2;</text:p>
      <text:p text:style-name="P1"><text:s text:c="12"/>end</text:p>
      <text:p text:style-name="P1"><text:s text:c="12"/>9'b000000100: begin </text:p>
      <text:p text:style-name="P1"><text:s text:c="16"/>key= 5'd3; </text:p>
      <text:p text:style-name="P1"><text:s text:c="12"/>end</text:p>
      <text:p text:style-name="P1"/>
      <text:p text:style-name="P1"><text:s text:c="12"/>9'b000001000: begin </text:p>
      <text:p text:style-name="P1"><text:s text:c="16"/>key= 5'd4;</text:p>
      <text:p text:style-name="P1"><text:s text:c="12"/>end</text:p>
      <text:p text:style-name="P1"><text:s text:c="12"/>9'b000010000: begin </text:p>
      <text:p text:style-name="P1"><text:s text:c="16"/>key= 5'd5;</text:p>
      <text:p text:style-name="P1"><text:s text:c="12"/>end</text:p>
      <text:p text:style-name="P1"><text:s text:c="12"/>9'b000100000: begin </text:p>
      <text:p text:style-name="P1"><text:s text:c="16"/>key= 5'd6; </text:p>
      <text:p text:style-name="P1"><text:s text:c="12"/>end</text:p>
      <text:p text:style-name="P1"/>
      <text:p text:style-name="P1"><text:s text:c="12"/>9'b001000000: begin </text:p>
      <text:p text:style-name="P1"><text:s text:c="16"/>key= 5'd7; </text:p>
      <text:p text:style-name="P1"><text:s text:c="12"/>end</text:p>
      <text:p text:style-name="P1"><text:s text:c="12"/>9'b010000000: begin </text:p>
      <text:p text:style-name="P1"><text:s text:c="16"/>key= 5'd8; </text:p>
      <text:p text:style-name="P1"><text:s text:c="12"/>end</text:p>
      <text:p text:style-name="P1"><text:s text:c="12"/>9'b100000000: begin </text:p>
      <text:p text:style-name="P1"><text:s text:c="16"/>key= 5'd9; </text:p>
      <text:p text:style-name="P1"><text:s text:c="12"/>end</text:p>
      <text:p text:style-name="P1"/>
      <text:p text:style-name="P1"><text:s text:c="12"/>default: begin </text:p>
      <text:p text:style-name="P1"><text:s text:c="16"/>key= 5'd0;</text:p>
      <text:p text:style-name="P1"><text:s text:c="12"/>end</text:p>
      <text:p text:style-name="P1"><text:s text:c="8"/>endcase</text:p>
      <text:p text:style-name="P1"><text:s text:c="4"/>end</text:p>
      <text:p text:style-name="P1"/>
      <text:p text:style-name="P1">endmodule</text:p>
      <text:p text:style-name="P2">TOPMODULE.V</text:p>
      <text:p text:style-name="P1"/>
      <text:p text:style-name="P1">module top_module(</text:p>
      <text:p text:style-name="P1"><text:s text:c="4"/>input clk,</text:p>
      <text:p text:style-name="P1"><text:s text:c="4"/>output audio_l,audio_r,</text:p>
      <text:p text:style-name="P1"><text:s text:c="8"/>input r1,r2,</text:p>
      <text:p text:style-name="P1"><text:s text:c="8"/>input r3,r4,</text:p>
      <text:p text:style-name="P1"><text:s text:c="8"/>output c1,c2,</text:p>
      <text:p text:style-name="P1"><text:s text:c="8"/>output c3,</text:p>
      <text:p text:style-name="P1"><text:s text:c="8"/>output c4,</text:p>
      <text:p text:style-name="P1"><text:s text:c="4"/>// <text:s text:c="8"/>output reg led_blue_n,</text:p>
      <text:p text:style-name="P1"><text:s text:c="4"/>// output reg led_amber_n,</text:p>
      <text:p text:style-name="P1"><text:s text:c="4"/>// output reg led_rgb_green_n</text:p>
      <text:p text:style-name="P1"><text:s text:c="4"/>);</text:p>
      <text:p text:style-name="P1"/>
      <text:p text:style-name="P1">wire [4:0] key;</text:p>
      <text:p text:style-name="P1">wire audio_l,audio_r;</text:p>
      <text:p text:style-name="P1"/>
      <text:p text:style-name="P1">audio audio_inst(</text:p>
      <text:p text:style-name="P1"><text:s text:c="4"/>.clk(clk),</text:p>
      <text:p text:style-name="P1"><text:s text:c="4"/>.key(key), <text:s/></text:p>
      <text:p text:style-name="P1"><text:s text:c="4"/>.audio_l(audio_l),</text:p>
      <text:p text:style-name="P1"><text:s text:c="4"/>.audio_r(audio_r)</text:p>
      <text:p text:style-name="P1">);</text:p>
      <text:p text:style-name="P1">buttons button_inst5(</text:p>
      <text:p text:style-name="P1"><text:s text:c="4"/>.clk(clk),</text:p>
      <text:p text:style-name="P1"><text:s text:c="4"/>.r1(r1),</text:p>
      <text:p text:style-name="P1"><text:s text:c="4"/>.r2(r2),</text:p>
      <text:p text:style-name="P1"><text:s text:c="4"/>.r3(r3),</text:p>
      <text:p text:style-name="P1"><text:s text:c="4"/>.c1(c1),</text:p>
      <text:p text:style-name="P1"><text:s text:c="4"/>.c2(c2),</text:p>
      <text:p text:style-name="P1"><text:s text:c="4"/>.c3(c3),</text:p>
      <text:p text:style-name="P1"><text:s text:c="4"/>.key(key),</text:p>
      <text:p text:style-name="P1"><text:s text:c="4"/>// .led_blue_n(led_blue_n),</text:p>
      <text:p text:style-name="P1"><text:s text:c="4"/>// .led_amber_n(led_amber_n),</text:p>
      <text:p text:style-name="P1"><text:s text:c="4"/>// .led_rgb_green_n(led_rgb_green_n)</text:p>
      <text:p text:style-name="P1"><text:s text:c="4"/>);</text:p>
      <text:p text:style-name="P1"/>
      <text:p text:style-name="P1"/>
      <text:p text:style-name="P3">SINOUT.v</text:p>
      <text:p text:style-name="P3">module sinout(</text:p>
      <text:p text:style-name="P3"><text:s text:c="4"/>input [7:0] addr,</text:p>
      <text:p text:style-name="P3"><text:s text:c="4"/>output reg signed [15:0] sine_out</text:p>
      <text:p text:style-name="P3">);</text:p>
      <text:p text:style-name="P3"/>
      <text:p text:style-name="P3"/>
      <text:p text:style-name="P3">always @(*) begin</text:p>
      <text:p text:style-name="P3"><text:s text:c="8"/></text:p>
      <text:p text:style-name="P3"><text:s text:c="8"/>case(addr)</text:p>
      <text:p text:style-name="P3">8'd0 <text:s text:c="2"/>: sine_out = 16'sd0;</text:p>
      <text:p text:style-name="P3">8'd1 <text:s text:c="2"/>: sine_out = 16'sd804;</text:p>
      <text:p text:style-name="P3">8'd2 <text:s text:c="2"/>: sine_out = 16'sd1608;</text:p>
      <text:p text:style-name="P3"><text:soft-page-break/>8'd3 <text:s text:c="2"/>: sine_out = 16'sd2410;</text:p>
      <text:p text:style-name="P3">8'd4 <text:s text:c="2"/>: sine_out = 16'sd3212;</text:p>
      <text:p text:style-name="P3">8'd5 <text:s text:c="2"/>: sine_out = 16'sd4011;</text:p>
      <text:p text:style-name="P3">8'd6 <text:s text:c="2"/>: sine_out = 16'sd4808;</text:p>
      <text:p text:style-name="P3">8'd7 <text:s text:c="2"/>: sine_out = 16'sd5602;</text:p>
      <text:p text:style-name="P3">8'd8 <text:s text:c="2"/>: sine_out = 16'sd6393;</text:p>
      <text:p text:style-name="P3">8'd9 <text:s text:c="2"/>: sine_out = 16'sd7179;</text:p>
      <text:p text:style-name="P3">8'd10 <text:s/>: sine_out = 16'sd7962;</text:p>
      <text:p text:style-name="P3">8'd11 <text:s/>: sine_out = 16'sd8739;</text:p>
      <text:p text:style-name="P3">8'd12 <text:s/>: sine_out = 16'sd9512;</text:p>
      <text:p text:style-name="P3">8'd13 <text:s/>: sine_out = 16'sd10278;</text:p>
      <text:p text:style-name="P3">8'd14 <text:s/>: sine_out = 16'sd11039;</text:p>
      <text:p text:style-name="P3">8'd15 <text:s/>: sine_out = 16'sd11793;</text:p>
      <text:p text:style-name="P3">8'd16 <text:s/>: sine_out = 16'sd12539;</text:p>
      <text:p text:style-name="P3">8'd17 <text:s/>: sine_out = 16'sd13279;</text:p>
      <text:p text:style-name="P3">8'd18 <text:s/>: sine_out = 16'sd14010;</text:p>
      <text:p text:style-name="P3">8'd19 <text:s/>: sine_out = 16'sd14732;</text:p>
      <text:p text:style-name="P3">8'd20 <text:s/>: sine_out = 16'sd15446;</text:p>
      <text:p text:style-name="P3">8'd21 <text:s/>: sine_out = 16'sd16151;</text:p>
      <text:p text:style-name="P3">8'd22 <text:s/>: sine_out = 16'sd16846;</text:p>
      <text:p text:style-name="P3">8'd23 <text:s/>: sine_out = 16'sd17530;</text:p>
      <text:p text:style-name="P3">8'd24 <text:s/>: sine_out = 16'sd18204;</text:p>
      <text:p text:style-name="P3">8'd25 <text:s/>: sine_out = 16'sd18868;</text:p>
      <text:p text:style-name="P3">8'd26 <text:s/>: sine_out = 16'sd19519;</text:p>
      <text:p text:style-name="P3">8'd27 <text:s/>: sine_out = 16'sd20159;</text:p>
      <text:p text:style-name="P3">8'd28 <text:s/>: sine_out = 16'sd20787;</text:p>
      <text:p text:style-name="P3">8'd29 <text:s/>: sine_out = 16'sd21403;</text:p>
      <text:p text:style-name="P3">8'd30 <text:s/>: sine_out = 16'sd22005;</text:p>
      <text:p text:style-name="P3">8'd31 <text:s/>: sine_out = 16'sd22594;</text:p>
      <text:p text:style-name="P3">8'd32 <text:s/>: sine_out = 16'sd23170;</text:p>
      <text:p text:style-name="P3">8'd33 <text:s/>: sine_out = 16'sd23731;</text:p>
      <text:p text:style-name="P3">8'd34 <text:s/>: sine_out = 16'sd24279;</text:p>
      <text:p text:style-name="P3">8'd35 <text:s/>: sine_out = 16'sd24811;</text:p>
      <text:p text:style-name="P3">8'd36 <text:s/>: sine_out = 16'sd25329;</text:p>
      <text:p text:style-name="P3">8'd37 <text:s/>: sine_out = 16'sd25832;</text:p>
      <text:p text:style-name="P3">8'd38 <text:s/>: sine_out = 16'sd26319;</text:p>
      <text:p text:style-name="P3">8'd39 <text:s/>: sine_out = 16'sd26790;</text:p>
      <text:p text:style-name="P3">8'd40 <text:s/>: sine_out = 16'sd27245;</text:p>
      <text:p text:style-name="P3">8'd41 <text:s/>: sine_out = 16'sd27683;</text:p>
      <text:p text:style-name="P3">8'd42 <text:s/>: sine_out = 16'sd28105;</text:p>
      <text:p text:style-name="P3">8'd43 <text:s/>: sine_out = 16'sd28510;</text:p>
      <text:p text:style-name="P3">8'd44 <text:s/>: sine_out = 16'sd28898;</text:p>
      <text:p text:style-name="P3">8'd45 <text:s/>: sine_out = 16'sd29268;</text:p>
      <text:p text:style-name="P3">8'd46 <text:s/>: sine_out = 16'sd29621;</text:p>
      <text:p text:style-name="P3">8'd47 <text:s/>: sine_out = 16'sd29956;</text:p>
      <text:p text:style-name="P3">8'd48 <text:s/>: sine_out = 16'sd30273;</text:p>
      <text:p text:style-name="P3">8'd49 <text:s/>: sine_out = 16'sd30571;</text:p>
      <text:p text:style-name="P3">8'd50 <text:s/>: sine_out = 16'sd30852;</text:p>
      <text:p text:style-name="P3">8'd51 <text:s/>: sine_out = 16'sd31113;</text:p>
      <text:p text:style-name="P3">8'd52 <text:s/>: sine_out = 16'sd31356;</text:p>
      <text:p text:style-name="P3">8'd53 <text:s/>: sine_out = 16'sd31580;</text:p>
      <text:p text:style-name="P3">8'd54 <text:s/>: sine_out = 16'sd31785;</text:p>
      <text:p text:style-name="P3"><text:soft-page-break/>8'd55 <text:s/>: sine_out = 16'sd31971;</text:p>
      <text:p text:style-name="P3">8'd56 <text:s/>: sine_out = 16'sd32137;</text:p>
      <text:p text:style-name="P3">8'd57 <text:s/>: sine_out = 16'sd32285;</text:p>
      <text:p text:style-name="P3">8'd58 <text:s/>: sine_out = 16'sd32412;</text:p>
      <text:p text:style-name="P3">8'd59 <text:s/>: sine_out = 16'sd32521;</text:p>
      <text:p text:style-name="P3">8'd60 <text:s/>: sine_out = 16'sd32609;</text:p>
      <text:p text:style-name="P3">8'd61 <text:s/>: sine_out = 16'sd32678;</text:p>
      <text:p text:style-name="P3">8'd62 <text:s/>: sine_out = 16'sd32728;</text:p>
      <text:p text:style-name="P3">8'd63 <text:s/>: sine_out = 16'sd32757;</text:p>
      <text:p text:style-name="P3">8'd64 <text:s/>: sine_out = 16'sd32767;</text:p>
      <text:p text:style-name="P3">8'd65 <text:s/>: sine_out = 16'sd32757;</text:p>
      <text:p text:style-name="P3">8'd66 <text:s/>: sine_out = 16'sd32728;</text:p>
      <text:p text:style-name="P3">8'd67 <text:s/>: sine_out = 16'sd32678;</text:p>
      <text:p text:style-name="P3">8'd68 <text:s/>: sine_out = 16'sd32609;</text:p>
      <text:p text:style-name="P3">8'd69 <text:s/>: sine_out = 16'sd32521;</text:p>
      <text:p text:style-name="P3">8'd70 <text:s/>: sine_out = 16'sd32412;</text:p>
      <text:p text:style-name="P3">8'd71 <text:s/>: sine_out = 16'sd32285;</text:p>
      <text:p text:style-name="P3">8'd72 <text:s/>: sine_out = 16'sd32137;</text:p>
      <text:p text:style-name="P3">8'd73 <text:s/>: sine_out = 16'sd31971;</text:p>
      <text:p text:style-name="P3">8'd74 <text:s/>: sine_out = 16'sd31785;</text:p>
      <text:p text:style-name="P3">8'd75 <text:s/>: sine_out = 16'sd31580;</text:p>
      <text:p text:style-name="P3">8'd76 <text:s/>: sine_out = 16'sd31356;</text:p>
      <text:p text:style-name="P3">8'd77 <text:s/>: sine_out = 16'sd31113;</text:p>
      <text:p text:style-name="P3">8'd78 <text:s/>: sine_out = 16'sd30852;</text:p>
      <text:p text:style-name="P3">8'd79 <text:s/>: sine_out = 16'sd30571;</text:p>
      <text:p text:style-name="P3">8'd80 <text:s/>: sine_out = 16'sd30273;</text:p>
      <text:p text:style-name="P3">8'd81 <text:s/>: sine_out = 16'sd29956;</text:p>
      <text:p text:style-name="P3">8'd82 <text:s/>: sine_out = 16'sd29621;</text:p>
      <text:p text:style-name="P3">8'd83 <text:s/>: sine_out = 16'sd29268;</text:p>
      <text:p text:style-name="P3">8'd84 <text:s/>: sine_out = 16'sd28898;</text:p>
      <text:p text:style-name="P3">8'd85 <text:s/>: sine_out = 16'sd28510;</text:p>
      <text:p text:style-name="P3">8'd86 <text:s/>: sine_out = 16'sd28105;</text:p>
      <text:p text:style-name="P3">8'd87 <text:s/>: sine_out = 16'sd27683;</text:p>
      <text:p text:style-name="P3">8'd88 <text:s/>: sine_out = 16'sd27245;</text:p>
      <text:p text:style-name="P3">8'd89 <text:s/>: sine_out = 16'sd26790;</text:p>
      <text:p text:style-name="P3">8'd90 <text:s/>: sine_out = 16'sd26319;</text:p>
      <text:p text:style-name="P3">8'd91 <text:s/>: sine_out = 16'sd25832;</text:p>
      <text:p text:style-name="P3">8'd92 <text:s/>: sine_out = 16'sd25329;</text:p>
      <text:p text:style-name="P3">8'd93 <text:s/>: sine_out = 16'sd24811;</text:p>
      <text:p text:style-name="P3">8'd94 <text:s/>: sine_out = 16'sd24279;</text:p>
      <text:p text:style-name="P3">8'd95 <text:s/>: sine_out = 16'sd23731;</text:p>
      <text:p text:style-name="P3">8'd96 <text:s/>: sine_out = 16'sd23170;</text:p>
      <text:p text:style-name="P3">8'd97 <text:s/>: sine_out = 16'sd22594;</text:p>
      <text:p text:style-name="P3">8'd98 <text:s/>: sine_out = 16'sd22005;</text:p>
      <text:p text:style-name="P3">8'd99 <text:s/>: sine_out = 16'sd21403;</text:p>
      <text:p text:style-name="P3">8'd100 : sine_out = 16'sd20787;</text:p>
      <text:p text:style-name="P3">8'd101 : sine_out = 16'sd20159;</text:p>
      <text:p text:style-name="P3">8'd102 : sine_out = 16'sd19519;</text:p>
      <text:p text:style-name="P3">8'd103 : sine_out = 16'sd18868;</text:p>
      <text:p text:style-name="P3">8'd104 : sine_out = 16'sd18204;</text:p>
      <text:p text:style-name="P3">8'd105 : sine_out = 16'sd17530;</text:p>
      <text:p text:style-name="P3">8'd106 : sine_out = 16'sd16846;</text:p>
      <text:p text:style-name="P3"><text:soft-page-break/>8'd107 : sine_out = 16'sd16151;</text:p>
      <text:p text:style-name="P3">8'd108 : sine_out = 16'sd15446;</text:p>
      <text:p text:style-name="P3">8'd109 : sine_out = 16'sd14732;</text:p>
      <text:p text:style-name="P3">8'd110 : sine_out = 16'sd14010;</text:p>
      <text:p text:style-name="P3">8'd111 : sine_out = 16'sd13279;</text:p>
      <text:p text:style-name="P3">8'd112 : sine_out = 16'sd12539;</text:p>
      <text:p text:style-name="P3">8'd113 : sine_out = 16'sd11793;</text:p>
      <text:p text:style-name="P3">8'd114 : sine_out = 16'sd11039;</text:p>
      <text:p text:style-name="P3">8'd115 : sine_out = 16'sd10278;</text:p>
      <text:p text:style-name="P3">8'd116 : sine_out = 16'sd9512;</text:p>
      <text:p text:style-name="P3">8'd117 : sine_out = 16'sd8739;</text:p>
      <text:p text:style-name="P3">8'd118 : sine_out = 16'sd7962;</text:p>
      <text:p text:style-name="P3">8'd119 : sine_out = 16'sd7179;</text:p>
      <text:p text:style-name="P3">8'd120 : sine_out = 16'sd6393;</text:p>
      <text:p text:style-name="P3">8'd121 : sine_out = 16'sd5602;</text:p>
      <text:p text:style-name="P3">8'd122 : sine_out = 16'sd4808;</text:p>
      <text:p text:style-name="P3">8'd123 : sine_out = 16'sd4011;</text:p>
      <text:p text:style-name="P3">8'd124 : sine_out = 16'sd3212;</text:p>
      <text:p text:style-name="P3">8'd125 : sine_out = 16'sd2410;</text:p>
      <text:p text:style-name="P3">8'd126 : sine_out = 16'sd1608;</text:p>
      <text:p text:style-name="P3">8'd127 : sine_out = 16'sd804;</text:p>
      <text:p text:style-name="P3">8'd128 : sine_out = 16'sd0;</text:p>
      <text:p text:style-name="P3">8'd129 : sine_out = -16'sd804;</text:p>
      <text:p text:style-name="P3">8'd130 : sine_out = -16'sd1608;</text:p>
      <text:p text:style-name="P3">8'd131 : sine_out = -16'sd2410;</text:p>
      <text:p text:style-name="P3">8'd132 : sine_out = -16'sd3212;</text:p>
      <text:p text:style-name="P3">8'd133 : sine_out = -16'sd4011;</text:p>
      <text:p text:style-name="P3">8'd134 : sine_out = -16'sd4808;</text:p>
      <text:p text:style-name="P3">8'd135 : sine_out = -16'sd5602;</text:p>
      <text:p text:style-name="P3">8'd136 : sine_out = -16'sd6393;</text:p>
      <text:p text:style-name="P3">8'd137 : sine_out = -16'sd7179;</text:p>
      <text:p text:style-name="P3">8'd138 : sine_out = -16'sd7962;</text:p>
      <text:p text:style-name="P3">8'd139 : sine_out = -16'sd8739;</text:p>
      <text:p text:style-name="P3">8'd140 : sine_out = -16'sd9512;</text:p>
      <text:p text:style-name="P3">8'd141 : sine_out = -16'sd10278;</text:p>
      <text:p text:style-name="P3">8'd142 : sine_out = -16'sd11039;</text:p>
      <text:p text:style-name="P3">8'd143 : sine_out = -16'sd11793;</text:p>
      <text:p text:style-name="P3">8'd144 : sine_out = -16'sd12539;</text:p>
      <text:p text:style-name="P3">8'd145 : sine_out = -16'sd13279;</text:p>
      <text:p text:style-name="P3">8'd146 : sine_out = -16'sd14010;</text:p>
      <text:p text:style-name="P3">8'd147 : sine_out = -16'sd14732;</text:p>
      <text:p text:style-name="P3">8'd148 : sine_out = -16'sd15446;</text:p>
      <text:p text:style-name="P3">8'd149 : sine_out = -16'sd16151;</text:p>
      <text:p text:style-name="P3">8'd150 : sine_out = -16'sd16846;</text:p>
      <text:p text:style-name="P3">8'd151 : sine_out = -16'sd17530;</text:p>
      <text:p text:style-name="P3">8'd152 : sine_out = -16'sd18204;</text:p>
      <text:p text:style-name="P3">8'd153 : sine_out = -16'sd18868;</text:p>
      <text:p text:style-name="P3">8'd154 : sine_out = -16'sd19519;</text:p>
      <text:p text:style-name="P3">8'd155 : sine_out = -16'sd20159;</text:p>
      <text:p text:style-name="P3">8'd156 : sine_out = -16'sd20787;</text:p>
      <text:p text:style-name="P3">8'd157 : sine_out = -16'sd21403;</text:p>
      <text:p text:style-name="P3">8'd158 : sine_out = -16'sd22005;</text:p>
      <text:p text:style-name="P3"><text:soft-page-break/>8'd159 : sine_out = -16'sd22594;</text:p>
      <text:p text:style-name="P3">8'd160 : sine_out = -16'sd23170;</text:p>
      <text:p text:style-name="P3">8'd161 : sine_out = -16'sd23731;</text:p>
      <text:p text:style-name="P3">8'd162 : sine_out = -16'sd24279;</text:p>
      <text:p text:style-name="P3">8'd163 : sine_out = -16'sd24811;</text:p>
      <text:p text:style-name="P3">8'd164 : sine_out = -16'sd25329;</text:p>
      <text:p text:style-name="P3">8'd165 : sine_out = -16'sd25832;</text:p>
      <text:p text:style-name="P3">8'd166 : sine_out = -16'sd26319;</text:p>
      <text:p text:style-name="P3">8'd167 : sine_out = -16'sd26790;</text:p>
      <text:p text:style-name="P3">8'd168 : sine_out = -16'sd27245;</text:p>
      <text:p text:style-name="P3">8'd169 : sine_out = -16'sd27683;</text:p>
      <text:p text:style-name="P3">8'd170 : sine_out = -16'sd28105;</text:p>
      <text:p text:style-name="P3">8'd171 : sine_out = -16'sd28510;</text:p>
      <text:p text:style-name="P3">8'd172 : sine_out = -16'sd28898;</text:p>
      <text:p text:style-name="P3">8'd173 : sine_out = -16'sd29268;</text:p>
      <text:p text:style-name="P3">8'd174 : sine_out = -16'sd29621;</text:p>
      <text:p text:style-name="P3">8'd175 : sine_out = -16'sd29956;</text:p>
      <text:p text:style-name="P3">8'd176 : sine_out = -16'sd30273;</text:p>
      <text:p text:style-name="P3">8'd177 : sine_out = -16'sd30571;</text:p>
      <text:p text:style-name="P3">8'd178 : sine_out = -16'sd30852;</text:p>
      <text:p text:style-name="P3">8'd179 : sine_out = -16'sd31113;</text:p>
      <text:p text:style-name="P3">8'd180 : sine_out = -16'sd31356;</text:p>
      <text:p text:style-name="P3">8'd181 : sine_out = -16'sd31580;</text:p>
      <text:p text:style-name="P3">8'd182 : sine_out = -16'sd31785;</text:p>
      <text:p text:style-name="P3">8'd183 : sine_out = -16'sd31971;</text:p>
      <text:p text:style-name="P3">8'd184 : sine_out = -16'sd32137;</text:p>
      <text:p text:style-name="P3">8'd185 : sine_out = -16'sd32285;</text:p>
      <text:p text:style-name="P3">8'd186 : sine_out = -16'sd32412;</text:p>
      <text:p text:style-name="P3">8'd187 : sine_out = -16'sd32521;</text:p>
      <text:p text:style-name="P3">8'd188 : sine_out = -16'sd32609;</text:p>
      <text:p text:style-name="P3">8'd189 : sine_out = -16'sd32678;</text:p>
      <text:p text:style-name="P3">8'd190 : sine_out = -16'sd32728;</text:p>
      <text:p text:style-name="P3">8'd191 : sine_out = -16'sd32757;</text:p>
      <text:p text:style-name="P3">8'd192 : sine_out = -16'sd32767;</text:p>
      <text:p text:style-name="P3">8'd193 : sine_out = -16'sd32757;</text:p>
      <text:p text:style-name="P3">8'd194 : sine_out = -16'sd32728;</text:p>
      <text:p text:style-name="P3">8'd195 : sine_out = -16'sd32678;</text:p>
      <text:p text:style-name="P3">8'd196 : sine_out = -16'sd32609;</text:p>
      <text:p text:style-name="P3">8'd197 : sine_out = -16'sd32521;</text:p>
      <text:p text:style-name="P3">8'd198 : sine_out = -16'sd32412;</text:p>
      <text:p text:style-name="P3">8'd199 : sine_out = -16'sd32285;</text:p>
      <text:p text:style-name="P3">8'd200 : sine_out = -16'sd32137;</text:p>
      <text:p text:style-name="P3">8'd201 : sine_out = -16'sd31971;</text:p>
      <text:p text:style-name="P3">8'd202 : sine_out = -16'sd31785;</text:p>
      <text:p text:style-name="P3">8'd203 : sine_out = -16'sd31580;</text:p>
      <text:p text:style-name="P3">8'd204 : sine_out = -16'sd31356;</text:p>
      <text:p text:style-name="P3">8'd205 : sine_out = -16'sd31113;</text:p>
      <text:p text:style-name="P3">8'd206 : sine_out = -16'sd30852;</text:p>
      <text:p text:style-name="P3">8'd207 : sine_out = -16'sd30571;</text:p>
      <text:p text:style-name="P3">8'd208 : sine_out = -16'sd30273;</text:p>
      <text:p text:style-name="P3">8'd209 : sine_out = -16'sd29956;</text:p>
      <text:p text:style-name="P3">8'd210 : sine_out = -16'sd29621;</text:p>
      <text:p text:style-name="P3"><text:soft-page-break/>8'd211 : sine_out = -16'sd29268;</text:p>
      <text:p text:style-name="P3">8'd212 : sine_out = -16'sd28898;</text:p>
      <text:p text:style-name="P3">8'd213 : sine_out = -16'sd28510;</text:p>
      <text:p text:style-name="P3">8'd214 : sine_out = -16'sd28105;</text:p>
      <text:p text:style-name="P3">8'd215 : sine_out = -16'sd27683;</text:p>
      <text:p text:style-name="P3">8'd216 : sine_out = -16'sd27245;</text:p>
      <text:p text:style-name="P3">8'd217 : sine_out = -16'sd26790;</text:p>
      <text:p text:style-name="P3">8'd218 : sine_out = -16'sd26319;</text:p>
      <text:p text:style-name="P3">8'd219 : sine_out = -16'sd25832;</text:p>
      <text:p text:style-name="P3">8'd220 : sine_out = -16'sd25329;</text:p>
      <text:p text:style-name="P3">8'd221 : sine_out = -16'sd24811;</text:p>
      <text:p text:style-name="P3">8'd222 : sine_out = -16'sd24279;</text:p>
      <text:p text:style-name="P3">8'd223 : sine_out = -16'sd23731;</text:p>
      <text:p text:style-name="P3">8'd224 : sine_out = -16'sd23170;</text:p>
      <text:p text:style-name="P3">8'd225 : sine_out = -16'sd22594;</text:p>
      <text:p text:style-name="P3">8'd226 : sine_out = -16'sd22005;</text:p>
      <text:p text:style-name="P3">8'd227 : sine_out = -16'sd21403;</text:p>
      <text:p text:style-name="P3">8'd228 : sine_out = -16'sd20787;</text:p>
      <text:p text:style-name="P3">8'd229 : sine_out = -16'sd20159;</text:p>
      <text:p text:style-name="P3">8'd230 : sine_out = -16'sd19519;</text:p>
      <text:p text:style-name="P3">8'd231 : sine_out = -16'sd18868;</text:p>
      <text:p text:style-name="P3">8'd232 : sine_out = -16'sd18204;</text:p>
      <text:p text:style-name="P3">8'd233 : sine_out = -16'sd17530;</text:p>
      <text:p text:style-name="P3">8'd234 : sine_out = -16'sd16846;</text:p>
      <text:p text:style-name="P3">8'd235 : sine_out = -16'sd16151;</text:p>
      <text:p text:style-name="P3">8'd236 : sine_out = -16'sd15446;</text:p>
      <text:p text:style-name="P3">8'd237 : sine_out = -16'sd14732;</text:p>
      <text:p text:style-name="P3">8'd238 : sine_out = -16'sd14010;</text:p>
      <text:p text:style-name="P3">8'd239 : sine_out = -16'sd13279;</text:p>
      <text:p text:style-name="P3">8'd240 : sine_out = -16'sd12539;</text:p>
      <text:p text:style-name="P3">8'd241 : sine_out = -16'sd11793;</text:p>
      <text:p text:style-name="P3">8'd242 : sine_out = -16'sd11039;</text:p>
      <text:p text:style-name="P3">8'd243 : sine_out = -16'sd10278;</text:p>
      <text:p text:style-name="P3">8'd244 : sine_out = -16'sd9512;</text:p>
      <text:p text:style-name="P3">8'd245 : sine_out = -16'sd8739;</text:p>
      <text:p text:style-name="P3">8'd246 : sine_out = -16'sd7962;</text:p>
      <text:p text:style-name="P3">8'd247 : sine_out = -16'sd7179;</text:p>
      <text:p text:style-name="P3">8'd248 : sine_out = -16'sd6393;</text:p>
      <text:p text:style-name="P3">8'd249 : sine_out = -16'sd5602;</text:p>
      <text:p text:style-name="P3">8'd250 : sine_out = -16'sd4808;</text:p>
      <text:p text:style-name="P3">8'd251 : sine_out = -16'sd4011;</text:p>
      <text:p text:style-name="P3">8'd252 : sine_out = -16'sd3212;</text:p>
      <text:p text:style-name="P3">8'd253 : sine_out = -16'sd2410;</text:p>
      <text:p text:style-name="P3">8'd254 : sine_out = -16'sd1608;</text:p>
      <text:p text:style-name="P3">8'd255 : sine_out = -16'sd804;</text:p>
      <text:p text:style-name="P3"><text:s text:c="10"/>default: sine_out = 16'sd0; <text:s/></text:p>
      <text:p text:style-name="P3"/>
      <text:p text:style-name="P3"/>
      <text:p text:style-name="P3"><text:s text:c="8"/>endcase</text:p>
      <text:p text:style-name="P3"/>
      <text:p text:style-name="P3"><text:s text:c="4"/>end</text:p>
      <text:p text:style-name="P3"/>
      <text:p text:style-name="P3"><text:soft-page-break/></text:p>
      <text:p text:style-name="P3">endmodu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5T14:39:54.342903737</meta:creation-date>
    <dc:date>2026-06-15T14:48:58.391501439</dc:date>
    <meta:editing-duration>PT9M5S</meta:editing-duration>
    <meta:editing-cycles>3</meta:editing-cycles>
    <meta:generator>LibreOffice/26.2.2.2$Linux_X86_64 LibreOffice_project/620$Build-2</meta:generator>
    <meta:document-statistic meta:table-count="0" meta:image-count="0" meta:object-count="0" meta:page-count="12" meta:paragraph-count="511" meta:word-count="1950" meta:character-count="14234" meta:non-whitespace-character-count="10951"/>
  </office:meta>
</office:document-meta>
</file>