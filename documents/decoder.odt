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7000001266C50C5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7e364" officeooo:paragraph-rsid="0017e364" style:font-size-asian="14pt" style:font-size-complex="14pt"/>
    </style:style>
    <style:style style:name="P2" style:family="paragraph" style:parent-style-name="Standard">
      <style:text-properties officeooo:rsid="0017e364" officeooo:paragraph-rsid="0017e364"/>
    </style:style>
    <style:style style:name="P3" style:family="paragraph" style:parent-style-name="Standard">
      <style:text-properties fo:font-size="14pt" officeooo:rsid="0017e364" officeooo:paragraph-rsid="0017e364" style:font-size-asian="12.25pt" style:font-size-complex="14pt"/>
    </style:style>
    <style:style style:name="P4" style:family="paragraph" style:parent-style-name="Standard">
      <style:text-properties fo:font-size="12pt" officeooo:rsid="0017e364" officeooo:paragraph-rsid="0017e364" style:font-size-asian="10.5pt" style:font-size-complex="12pt"/>
    </style:style>
    <style:style style:name="P5" style:family="paragraph" style:parent-style-name="Standard">
      <style:text-properties fo:font-size="12pt" officeooo:rsid="001870c0" officeooo:paragraph-rsid="001870c0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ERTZEL ALGORITHM</text:p>
      <text:p text:style-name="P2"/>
      <text:p text:style-name="P2"/>
      <text:p text:style-name="P2">module goertzel</text:p>
      <text:p text:style-name="P2"><text:s text:c="2"/>(</text:p>
      <text:p text:style-name="P2"/>
      <text:p text:style-name="P2"><text:s text:c="4"/>input wire clk,reset,</text:p>
      <text:p text:style-name="P2"><text:s text:c="4"/>output reg signed [15:0] maxcoeff,</text:p>
      <text:p text:style-name="P2"><text:s text:c="4"/>output wire signed [15:0] COEFF_tb,</text:p>
      <text:p text:style-name="P2"><text:s text:c="4"/>output reg signed [63:0] power_tb,</text:p>
      <text:p text:style-name="P2"><text:s text:c="4"/>output reg signed [63:0] max_power,</text:p>
      <text:p text:style-name="P2"><text:s text:c="4"/>output wire signed [63:0] power</text:p>
      <text:p text:style-name="P2"/>
      <text:p text:style-name="P2"/>
      <text:p text:style-name="P2"/>
      <text:p text:style-name="P2"><text:s text:c="2"/>);</text:p>
      <text:p text:style-name="P2"/>
      <text:p text:style-name="P2"><text:s text:c="2"/>reg [6:0] addr = 7'd0;</text:p>
      <text:p text:style-name="P2"><text:s text:c="2"/>wire signed [15:0] sample;</text:p>
      <text:p text:style-name="P2"/>
      <text:p text:style-name="P2"><text:s text:c="2"/>localparam integer Fs = 8000;</text:p>
      <text:p text:style-name="P2"><text:s text:c="2"/>localparam integer N <text:s/>= 128;</text:p>
      <text:p text:style-name="P2"/>
      <text:p text:style-name="P2"><text:s text:c="2"/>reg signed [15:0] COEFF [0:7];</text:p>
      <text:p text:style-name="P2"/>
      <text:p text:style-name="P2"/>
      <text:p text:style-name="P2"/>
      <text:p text:style-name="P2"/>
      <text:p text:style-name="P2"><text:s text:c="2"/>initial</text:p>
      <text:p text:style-name="P2"><text:s text:c="2"/>begin</text:p>
      <text:p text:style-name="P2"><text:s text:c="4"/>COEFF[0] = 16'sd28106; // 697 Hz</text:p>
      <text:p text:style-name="P2"><text:s text:c="4"/>COEFF[1] = 16'sd27018; // 770 Hz</text:p>
      <text:p text:style-name="P2"><text:s text:c="4"/>COEFF[2] = 16'sd25330; // 852 Hz</text:p>
      <text:p text:style-name="P2"><text:s text:c="4"/>COEFF[3] = 16'sd24126; // 941 Hz</text:p>
      <text:p text:style-name="P2"><text:s text:c="4"/>// COEFF[4] = 16'sd19478; // 1209 Hz</text:p>
      <text:p text:style-name="P2"><text:s text:c="4"/>// COEFF[5] = 16'sd16846; // 1336 Hz</text:p>
      <text:p text:style-name="P2"><text:s text:c="4"/>// COEFF[6] = 16'sd12490; // 1477 Hz</text:p>
      <text:p text:style-name="P2"><text:s text:c="4"/>// COEFF[7] = 16'sd9220; <text:s/>// 1633 Hz</text:p>
      <text:p text:style-name="P2"><text:s text:c="2"/>end</text:p>
      <text:p text:style-name="P2"/>
      <text:p text:style-name="P2"/>
      <text:p text:style-name="P2"/>
      <text:p text:style-name="P2"><text:s text:c="2"/>reg [1:0] i = 2'd0;</text:p>
      <text:p text:style-name="P2"><text:s text:c="2"/>reg signed [31:0] s1 = 0;</text:p>
      <text:p text:style-name="P2"><text:s text:c="2"/>reg signed [31:0] s2 = 0;</text:p>
      <text:p text:style-name="P2"/>
      <text:p text:style-name="P2"><text:s text:c="2"/>wire signed [31:0] s_next;</text:p>
      <text:p text:style-name="P2"><text:s text:c="2"/>wire signed [47:0] s1_prod;</text:p>
      <text:p text:style-name="P2"><text:s text:c="2"/>assign s1_prod = COEFF[i] * s1;</text:p>
      <text:p text:style-name="P2"><text:s text:c="2"/>reg [6:0] count = 0;</text:p>
      <text:p text:style-name="P2"/>
      <text:p text:style-name="P2"><text:s text:c="2"/>assign COEFF_tb=COEFF[i];</text:p>
      <text:p text:style-name="P2"><text:soft-page-break/><text:s text:c="2"/>assign s_next = {{16{sample[15]}}, sample} + (s1_prod &gt;&gt;&gt; 14) - s2;</text:p>
      <text:p text:style-name="P2"/>
      <text:p text:style-name="P2"><text:s text:c="2"/>assign power =</text:p>
      <text:p text:style-name="P2"><text:s text:c="9"/>(s_next * s_next)</text:p>
      <text:p text:style-name="P2"><text:s text:c="9"/>+ (s1 * s1)</text:p>
      <text:p text:style-name="P2"><text:s text:c="9"/>- (((COEFF[i] * s_next * s1) &gt;&gt;&gt; 14));</text:p>
      <text:p text:style-name="P2"/>
      <text:p text:style-name="P2"><text:s text:c="2"/>always @(posedge clk)</text:p>
      <text:p text:style-name="P2"><text:s text:c="2"/>begin</text:p>
      <text:p text:style-name="P2"/>
      <text:p text:style-name="P2"><text:s text:c="4"/>if(reset)</text:p>
      <text:p text:style-name="P2"><text:s text:c="4"/>begin</text:p>
      <text:p text:style-name="P2"><text:s text:c="6"/>addr <text:s text:c="5"/>&lt;= 7'd0;</text:p>
      <text:p text:style-name="P2"><text:s text:c="6"/>count <text:s text:c="4"/>&lt;= 7'd0;</text:p>
      <text:p text:style-name="P2"><text:s text:c="6"/>i <text:s text:c="8"/>&lt;= 2'd0;</text:p>
      <text:p text:style-name="P2"><text:s text:c="6"/>s1 <text:s text:c="7"/>&lt;= 32'sd0;</text:p>
      <text:p text:style-name="P2"><text:s text:c="6"/>s2 <text:s text:c="7"/>&lt;= 32'sd0;</text:p>
      <text:p text:style-name="P2"><text:s text:c="6"/>max_power &lt;= 64'sd0;</text:p>
      <text:p text:style-name="P2"><text:s text:c="6"/>maxcoeff <text:s/>&lt;= 16'sd0;</text:p>
      <text:p text:style-name="P2"><text:s text:c="6"/>power_tb <text:s/>&lt;= 64'sd0;</text:p>
      <text:p text:style-name="P2"/>
      <text:p text:style-name="P2"><text:s text:c="4"/>end</text:p>
      <text:p text:style-name="P2"><text:s text:c="4"/>else</text:p>
      <text:p text:style-name="P2"><text:s text:c="4"/>begin</text:p>
      <text:p text:style-name="P2"/>
      <text:p text:style-name="P2"/>
      <text:p text:style-name="P2"><text:s text:c="6"/>addr &lt;= addr + 1'b1;</text:p>
      <text:p text:style-name="P2"/>
      <text:p text:style-name="P2"><text:s text:c="6"/>if(count == 7'd127)</text:p>
      <text:p text:style-name="P2"><text:s text:c="6"/>begin</text:p>
      <text:p text:style-name="P2"><text:s text:c="8"/>power_tb&lt;=power;</text:p>
      <text:p text:style-name="P2"/>
      <text:p text:style-name="P2"><text:s text:c="8"/>if(power&gt;max_power)</text:p>
      <text:p text:style-name="P2"><text:s text:c="8"/>begin</text:p>
      <text:p text:style-name="P2"><text:s text:c="10"/>max_power&lt;=power;</text:p>
      <text:p text:style-name="P2"><text:s text:c="10"/>maxcoeff&lt;=COEFF[i];</text:p>
      <text:p text:style-name="P2"/>
      <text:p text:style-name="P2"><text:s text:c="8"/>end</text:p>
      <text:p text:style-name="P2"/>
      <text:p text:style-name="P2"/>
      <text:p text:style-name="P2"><text:s text:c="8"/>count &lt;= 7'd0;</text:p>
      <text:p text:style-name="P2"><text:s text:c="8"/>s1 <text:s text:c="3"/>&lt;= 32'sd0;</text:p>
      <text:p text:style-name="P2"><text:s text:c="8"/>s2 <text:s text:c="3"/>&lt;= 32'sd0;</text:p>
      <text:p text:style-name="P2"><text:s text:c="8"/>addr <text:s/>&lt;= 7'd0;</text:p>
      <text:p text:style-name="P2"/>
      <text:p text:style-name="P2"><text:s text:c="8"/>if (i == 2'd3)</text:p>
      <text:p text:style-name="P2"><text:s text:c="8"/>begin</text:p>
      <text:p text:style-name="P2"><text:s text:c="10"/>i &lt;= 2'd0;</text:p>
      <text:p text:style-name="P2"><text:s text:c="8"/>end</text:p>
      <text:p text:style-name="P2"><text:s text:c="8"/>else</text:p>
      <text:p text:style-name="P2"><text:s text:c="8"/>begin</text:p>
      <text:p text:style-name="P2"><text:s text:c="10"/>i &lt;= i + 1'b1;</text:p>
      <text:p text:style-name="P2"><text:soft-page-break/><text:s text:c="8"/>end</text:p>
      <text:p text:style-name="P2"><text:s text:c="6"/>end</text:p>
      <text:p text:style-name="P2"><text:s text:c="6"/>else</text:p>
      <text:p text:style-name="P2"><text:s text:c="6"/>begin</text:p>
      <text:p text:style-name="P2"/>
      <text:p text:style-name="P2"><text:s text:c="8"/>s2 &lt;= s1;</text:p>
      <text:p text:style-name="P2"><text:s text:c="8"/>s1 &lt;= s_next;</text:p>
      <text:p text:style-name="P2"/>
      <text:p text:style-name="P2"><text:s text:c="8"/>count &lt;= count + 1'b1;</text:p>
      <text:p text:style-name="P2"/>
      <text:p text:style-name="P2"><text:s text:c="6"/>end</text:p>
      <text:p text:style-name="P2"><text:s text:c="4"/>end</text:p>
      <text:p text:style-name="P2"><text:s text:c="2"/>end</text:p>
      <text:p text:style-name="P2"/>
      <text:p text:style-name="P2"><text:s text:c="2"/>sinwave sw(</text:p>
      <text:p text:style-name="P2"><text:s text:c="12"/>.addr(addr),</text:p>
      <text:p text:style-name="P2"><text:s text:c="12"/>.sample(sample)</text:p>
      <text:p text:style-name="P2"><text:s text:c="10"/>);</text:p>
      <text:p text:style-name="P2"/>
      <text:p text:style-name="P2">endmodule</text:p>
      <text:p text:style-name="P2"/>
      <text:p text:style-name="P2">module goertzel1</text:p>
      <text:p text:style-name="P2"><text:s text:c="2"/>(</text:p>
      <text:p text:style-name="P2"/>
      <text:p text:style-name="P2"><text:s text:c="4"/>input wire clk,reset,</text:p>
      <text:p text:style-name="P2"><text:s text:c="4"/>output reg signed [15:0] maxcoeff,</text:p>
      <text:p text:style-name="P2"><text:s text:c="4"/>output wire signed [15:0] COEFF_tb,</text:p>
      <text:p text:style-name="P2"><text:s text:c="4"/>output reg signed [63:0] power_tb,</text:p>
      <text:p text:style-name="P2"><text:s text:c="4"/>output reg signed [63:0] max_power,</text:p>
      <text:p text:style-name="P2"><text:s text:c="4"/>output wire signed [63:0] power</text:p>
      <text:p text:style-name="P2"/>
      <text:p text:style-name="P2"/>
      <text:p text:style-name="P2"/>
      <text:p text:style-name="P2"><text:s text:c="2"/>);</text:p>
      <text:p text:style-name="P2"/>
      <text:p text:style-name="P2"><text:s text:c="2"/>reg [6:0] addr = 7'd0;</text:p>
      <text:p text:style-name="P2"><text:s text:c="2"/>wire signed [15:0] sample;</text:p>
      <text:p text:style-name="P2"/>
      <text:p text:style-name="P2"><text:s text:c="2"/>localparam integer Fs = 8000;</text:p>
      <text:p text:style-name="P2"><text:s text:c="2"/>localparam integer N <text:s/>= 128;</text:p>
      <text:p text:style-name="P2"/>
      <text:p text:style-name="P2"><text:s text:c="2"/>reg signed [15:0] COEFF [0:7];</text:p>
      <text:p text:style-name="P2"/>
      <text:p text:style-name="P2"/>
      <text:p text:style-name="P2"/>
      <text:p text:style-name="P2"/>
      <text:p text:style-name="P2"><text:s text:c="2"/>initial</text:p>
      <text:p text:style-name="P2"><text:s text:c="2"/>begin</text:p>
      <text:p text:style-name="P2"><text:s text:c="4"/>// COEFF[0] = 16'sd28106; // 697 Hz</text:p>
      <text:p text:style-name="P2"><text:s text:c="4"/>// COEFF[1] = 16'sd27018; // 770 Hz</text:p>
      <text:p text:style-name="P2"><text:s text:c="4"/>// COEFF[2] = 16'sd25330; // 852 Hz</text:p>
      <text:p text:style-name="P2"><text:s text:c="4"/>// COEFF[3] = 16'sd24126; // 941 Hz</text:p>
      <text:p text:style-name="P2"><text:soft-page-break/><text:s text:c="4"/>COEFF[0] = 16'sd19478; // 1209 Hz</text:p>
      <text:p text:style-name="P2"><text:s text:c="4"/>COEFF[1] = 16'sd16846; // 1336 Hz</text:p>
      <text:p text:style-name="P2"><text:s text:c="4"/>COEFF[2] = 16'sd12490; // 1477 Hz</text:p>
      <text:p text:style-name="P2"><text:s text:c="4"/>COEFF[3] = 16'sd9220; <text:s/>// 1633 Hz</text:p>
      <text:p text:style-name="P2"><text:s text:c="2"/>end</text:p>
      <text:p text:style-name="P2"/>
      <text:p text:style-name="P2"/>
      <text:p text:style-name="P2"/>
      <text:p text:style-name="P2"><text:s text:c="2"/>reg [1:0] i = 2'd0;</text:p>
      <text:p text:style-name="P2"><text:s text:c="2"/>reg signed [31:0] s1 = 0;</text:p>
      <text:p text:style-name="P2"><text:s text:c="2"/>reg signed [31:0] s2 = 0;</text:p>
      <text:p text:style-name="P2"/>
      <text:p text:style-name="P2"><text:s text:c="2"/>wire signed [31:0] s_next;</text:p>
      <text:p text:style-name="P2"><text:s text:c="2"/>wire signed [47:0] s1_prod;</text:p>
      <text:p text:style-name="P2"><text:s text:c="2"/>assign s1_prod = COEFF[i] * s1;</text:p>
      <text:p text:style-name="P2"><text:s text:c="2"/>reg [6:0] count = 0;</text:p>
      <text:p text:style-name="P2"/>
      <text:p text:style-name="P2"><text:s text:c="2"/>assign COEFF_tb=COEFF[i];</text:p>
      <text:p text:style-name="P2"><text:s text:c="2"/>assign s_next = {{16{sample[15]}}, sample} + (s1_prod &gt;&gt;&gt; 14) - s2;</text:p>
      <text:p text:style-name="P2"/>
      <text:p text:style-name="P2"><text:s text:c="2"/>assign power =</text:p>
      <text:p text:style-name="P2"><text:s text:c="9"/>(s_next * s_next)</text:p>
      <text:p text:style-name="P2"><text:s text:c="9"/>+ (s1 * s1)</text:p>
      <text:p text:style-name="P2"><text:s text:c="9"/>- (((COEFF[i] * s_next * s1) &gt;&gt;&gt; 14));</text:p>
      <text:p text:style-name="P2"/>
      <text:p text:style-name="P2"><text:s text:c="2"/>always @(posedge clk)</text:p>
      <text:p text:style-name="P2"><text:s text:c="2"/>begin</text:p>
      <text:p text:style-name="P2"/>
      <text:p text:style-name="P2"><text:s text:c="4"/>if(reset)</text:p>
      <text:p text:style-name="P2"><text:s text:c="4"/>begin</text:p>
      <text:p text:style-name="P2"><text:s text:c="6"/>addr <text:s text:c="5"/>&lt;= 7'd0;</text:p>
      <text:p text:style-name="P2"><text:s text:c="6"/>count <text:s text:c="4"/>&lt;= 7'd0;</text:p>
      <text:p text:style-name="P2"><text:s text:c="6"/>i <text:s text:c="8"/>&lt;= 2'd0;</text:p>
      <text:p text:style-name="P2"><text:s text:c="6"/>s1 <text:s text:c="7"/>&lt;= 32'sd0;</text:p>
      <text:p text:style-name="P2"><text:s text:c="6"/>s2 <text:s text:c="7"/>&lt;= 32'sd0;</text:p>
      <text:p text:style-name="P2"><text:s text:c="6"/>max_power &lt;= 64'sd0;</text:p>
      <text:p text:style-name="P2"><text:s text:c="6"/>maxcoeff <text:s/>&lt;= 16'sd0;</text:p>
      <text:p text:style-name="P2"><text:s text:c="6"/>power_tb <text:s/>&lt;= 64'sd0;</text:p>
      <text:p text:style-name="P2"/>
      <text:p text:style-name="P2"><text:s text:c="4"/>end</text:p>
      <text:p text:style-name="P2"><text:s text:c="4"/>else</text:p>
      <text:p text:style-name="P2"><text:s text:c="4"/>begin</text:p>
      <text:p text:style-name="P2"/>
      <text:p text:style-name="P2"/>
      <text:p text:style-name="P2"><text:s text:c="6"/>addr &lt;= addr + 1'b1;</text:p>
      <text:p text:style-name="P2"/>
      <text:p text:style-name="P2"><text:s text:c="6"/>if(count == 7'd127)</text:p>
      <text:p text:style-name="P2"><text:s text:c="6"/>begin</text:p>
      <text:p text:style-name="P2"><text:s text:c="8"/>power_tb&lt;=power;</text:p>
      <text:p text:style-name="P2"/>
      <text:p text:style-name="P2"><text:s text:c="8"/>if(power&gt;max_power)</text:p>
      <text:p text:style-name="P2"><text:s text:c="8"/>begin</text:p>
      <text:p text:style-name="P2"><text:soft-page-break/><text:s text:c="10"/>max_power&lt;=power;</text:p>
      <text:p text:style-name="P2"><text:s text:c="10"/>maxcoeff&lt;=COEFF[i];</text:p>
      <text:p text:style-name="P2"/>
      <text:p text:style-name="P2"><text:s text:c="8"/>end</text:p>
      <text:p text:style-name="P2"/>
      <text:p text:style-name="P2"/>
      <text:p text:style-name="P2"><text:s text:c="8"/>count &lt;= 7'd0;</text:p>
      <text:p text:style-name="P2"><text:s text:c="8"/>s1 <text:s text:c="3"/>&lt;= 32'sd0;</text:p>
      <text:p text:style-name="P2"><text:s text:c="8"/>s2 <text:s text:c="3"/>&lt;= 32'sd0;</text:p>
      <text:p text:style-name="P2"><text:s text:c="8"/>addr <text:s/>&lt;= 7'd0;</text:p>
      <text:p text:style-name="P2"/>
      <text:p text:style-name="P2"><text:s text:c="8"/>if (i == 2'd3)</text:p>
      <text:p text:style-name="P2"><text:s text:c="8"/>begin</text:p>
      <text:p text:style-name="P2"><text:s text:c="10"/>i &lt;= 2'd0;</text:p>
      <text:p text:style-name="P2"><text:s text:c="8"/>end</text:p>
      <text:p text:style-name="P2"><text:s text:c="8"/>else</text:p>
      <text:p text:style-name="P2"><text:s text:c="8"/>begin</text:p>
      <text:p text:style-name="P2"><text:s text:c="10"/>i &lt;= i + 1'b1;</text:p>
      <text:p text:style-name="P2"><text:s text:c="8"/>end</text:p>
      <text:p text:style-name="P2"><text:s text:c="6"/>end</text:p>
      <text:p text:style-name="P2"><text:s text:c="6"/>else</text:p>
      <text:p text:style-name="P2"><text:s text:c="6"/>begin</text:p>
      <text:p text:style-name="P2"/>
      <text:p text:style-name="P2"><text:s text:c="8"/>s2 &lt;= s1;</text:p>
      <text:p text:style-name="P2"><text:s text:c="8"/>s1 &lt;= s_next;</text:p>
      <text:p text:style-name="P2"/>
      <text:p text:style-name="P2"><text:s text:c="8"/>count &lt;= count + 1'b1;</text:p>
      <text:p text:style-name="P2"/>
      <text:p text:style-name="P2"><text:s text:c="6"/>end</text:p>
      <text:p text:style-name="P2"><text:s text:c="4"/>end</text:p>
      <text:p text:style-name="P2"><text:s text:c="2"/>end</text:p>
      <text:p text:style-name="P2"/>
      <text:p text:style-name="P2"><text:s text:c="2"/>sinwave sw(</text:p>
      <text:p text:style-name="P2"><text:s text:c="12"/>.addr(addr),</text:p>
      <text:p text:style-name="P2"><text:s text:c="12"/>.sample(sample)</text:p>
      <text:p text:style-name="P2"><text:s text:c="10"/>);</text:p>
      <text:p text:style-name="P2"/>
      <text:p text:style-name="P2">endmodule</text:p>
      <text:p text:style-name="P2"/>
      <text:p text:style-name="P2"/>
      <text:p text:style-name="P3">TESTBENCH</text:p>
      <text:p text:style-name="P3"/>
      <text:p text:style-name="P4">`timescale 1ns/1ps</text:p>
      <text:p text:style-name="P4"/>
      <text:p text:style-name="P4">module tb_goertzel;</text:p>
      <text:p text:style-name="P4"/>
      <text:p text:style-name="P4">reg clk;</text:p>
      <text:p text:style-name="P4">reg reset;</text:p>
      <text:p text:style-name="P4"/>
      <text:p text:style-name="P4"/>
      <text:p text:style-name="P4"/>
      <text:p text:style-name="P4">reg [7:0] key [0:3][0:3];</text:p>
      <text:p text:style-name="P4"><text:soft-page-break/>integer j,k;</text:p>
      <text:p text:style-name="P4"/>
      <text:p text:style-name="P4">initial begin</text:p>
      <text:p text:style-name="P4"><text:s text:c="4"/>key[0][0] = "1"; key[0][1] = "2"; key[0][2] = "3"; key[0][3] = "A";</text:p>
      <text:p text:style-name="P4"><text:s text:c="4"/>key[1][0] = "4"; key[1][1] = "5"; key[1][2] = "6"; key[1][3] = "B";</text:p>
      <text:p text:style-name="P4"><text:s text:c="4"/>key[2][0] = "7"; key[2][1] = "8"; key[2][2] = "9"; key[2][3] = "C";</text:p>
      <text:p text:style-name="P4"><text:s text:c="4"/>key[3][0] = "*"; key[3][1] = "0"; key[3][2] = "#"; key[3][3] = "D";</text:p>
      <text:p text:style-name="P4">end</text:p>
      <text:p text:style-name="P4"/>
      <text:p text:style-name="P4">wire signed [15:0] maxcoeff;</text:p>
      <text:p text:style-name="P4"><text:s text:c="4"/>wire signed [63:0] power ;</text:p>
      <text:p text:style-name="P4"><text:s text:c="4"/>wire signed [63:0] power_tb ;</text:p>
      <text:p text:style-name="P4"><text:s text:c="4"/>wire signed [63:0] max_power ;</text:p>
      <text:p text:style-name="P4"><text:s text:c="4"/>wire signed [15:0] COEFF_tb;</text:p>
      <text:p text:style-name="P4"/>
      <text:p text:style-name="P4"/>
      <text:p text:style-name="P4">reg reset1;</text:p>
      <text:p text:style-name="P4"/>
      <text:p text:style-name="P4"/>
      <text:p text:style-name="P4">wire signed [15:0] maxcoeff1;</text:p>
      <text:p text:style-name="P4"><text:s text:c="4"/>wire signed [63:0] power1 ;</text:p>
      <text:p text:style-name="P4"><text:s text:c="4"/>wire signed [63:0] power_tb1 ;</text:p>
      <text:p text:style-name="P4"><text:s text:c="4"/>wire signed [63:0] max_power1 ;</text:p>
      <text:p text:style-name="P4"><text:s text:c="4"/>wire signed [15:0] COEFF_tb1;</text:p>
      <text:p text:style-name="P4"/>
      <text:p text:style-name="P4">goertzel dut(</text:p>
      <text:p text:style-name="P4">.clk(clk),</text:p>
      <text:p text:style-name="P4">.reset(reset),</text:p>
      <text:p text:style-name="P4">.maxcoeff(maxcoeff),</text:p>
      <text:p text:style-name="P4">.power(power),</text:p>
      <text:p text:style-name="P4">.power_tb(power_tb),</text:p>
      <text:p text:style-name="P4">.COEFF_tb(COEFF_tb),</text:p>
      <text:p text:style-name="P4">.max_power(max_power)</text:p>
      <text:p text:style-name="P4"/>
      <text:p text:style-name="P4">);</text:p>
      <text:p text:style-name="P4"/>
      <text:p text:style-name="P4">goertzel1 dut1(</text:p>
      <text:p text:style-name="P4">.clk(clk),</text:p>
      <text:p text:style-name="P4">.reset(reset1),</text:p>
      <text:p text:style-name="P4">.maxcoeff(maxcoeff1),</text:p>
      <text:p text:style-name="P4">.power(power1),</text:p>
      <text:p text:style-name="P4">.power_tb(power_tb1),</text:p>
      <text:p text:style-name="P4">.COEFF_tb(COEFF_tb1),</text:p>
      <text:p text:style-name="P4">.max_power(max_power1)</text:p>
      <text:p text:style-name="P4"/>
      <text:p text:style-name="P4">);</text:p>
      <text:p text:style-name="P4"/>
      <text:p text:style-name="P4"/>
      <text:p text:style-name="P4"/>
      <text:p text:style-name="P4">always #41.667 clk = ~clk;</text:p>
      <text:p text:style-name="P4"/>
      <text:p text:style-name="P4">integer F;</text:p>
      <text:p text:style-name="P4"><text:soft-page-break/></text:p>
      <text:p text:style-name="P4">initial begin</text:p>
      <text:p text:style-name="P4"><text:s text:c="4"/>$dumpfile("wave.vcd");</text:p>
      <text:p text:style-name="P4"><text:s text:c="4"/>$dumpvars(0, tb_goertzel);</text:p>
      <text:p text:style-name="P4"><text:s text:c="8"/>clk = 0;</text:p>
      <text:p text:style-name="P4"><text:s text:c="4"/>reset=1;</text:p>
      <text:p text:style-name="P4"><text:s text:c="4"/>#100</text:p>
      <text:p text:style-name="P4"><text:s text:c="4"/>reset=0;</text:p>
      <text:p text:style-name="P4"><text:s text:c="10"/>$monitor("time=%0t , i=%0d , coeff=%0d , power=%0d , peakpower=%0d", </text:p>
      <text:p text:style-name="P4"><text:s text:c="16"/>$time, dut.i, COEFF_tb, power_tb, max_power);</text:p>
      <text:p text:style-name="P4"><text:s text:c="3"/>#50000; <text:s/></text:p>
      <text:p text:style-name="P4">case(maxcoeff) </text:p>
      <text:p text:style-name="P4"><text:s text:c="4"/>16'sd28106 :begin</text:p>
      <text:p text:style-name="P4"><text:s text:c="8"/>F = 697;</text:p>
      <text:p text:style-name="P4"><text:s text:c="8"/>j=0;</text:p>
      <text:p text:style-name="P4"><text:s text:c="4"/>end</text:p>
      <text:p text:style-name="P4"><text:s text:c="4"/>16'sd27018 : begin</text:p>
      <text:p text:style-name="P4"><text:s text:c="8"/>F = 770; </text:p>
      <text:p text:style-name="P4"><text:s text:c="8"/>j=1;</text:p>
      <text:p text:style-name="P4"><text:s text:c="4"/>end</text:p>
      <text:p text:style-name="P4"><text:s text:c="4"/>16'sd25330 : begin</text:p>
      <text:p text:style-name="P4"><text:s text:c="8"/>F = 852;</text:p>
      <text:p text:style-name="P4"><text:s text:c="8"/>j=2;</text:p>
      <text:p text:style-name="P4"><text:s text:c="4"/>end</text:p>
      <text:p text:style-name="P4"><text:s text:c="4"/>16'sd24126 : </text:p>
      <text:p text:style-name="P4"><text:s text:c="4"/>begin</text:p>
      <text:p text:style-name="P4"><text:s text:c="4"/>F = 941; </text:p>
      <text:p text:style-name="P4"><text:s text:c="4"/>j=3;</text:p>
      <text:p text:style-name="P4"><text:s text:c="4"/>end</text:p>
      <text:p text:style-name="P4"><text:s text:c="4"/>// 16'sd19478 : F = 1209; </text:p>
      <text:p text:style-name="P4"><text:s text:c="4"/>// 16'sd16846 : F = 1336; </text:p>
      <text:p text:style-name="P4"><text:s text:c="4"/>// 16'sd12490 : F = 1477; </text:p>
      <text:p text:style-name="P4"><text:s text:c="4"/>// 16'sd9220 <text:s/>: F = 1633;</text:p>
      <text:p text:style-name="P4"><text:s text:c="4"/>default <text:s text:c="3"/>: F = 0;</text:p>
      <text:p text:style-name="P4">endcase</text:p>
      <text:p text:style-name="P4"/>
      <text:p text:style-name="P4"><text:s text:c="8"/>$display("det freq: %0d Hz", F);</text:p>
      <text:p text:style-name="P4"><text:s text:c="8"/>$display("power peak: %0d", max_power);</text:p>
      <text:p text:style-name="P4"><text:s text:c="8"/></text:p>
      <text:p text:style-name="P4"/>
      <text:p text:style-name="P4"/>
      <text:p text:style-name="P4"><text:s text:c="11"/>clk = 0;</text:p>
      <text:p text:style-name="P4"><text:s text:c="4"/>reset1=1;</text:p>
      <text:p text:style-name="P4"><text:s text:c="4"/>#100</text:p>
      <text:p text:style-name="P4"><text:s text:c="4"/>reset1=0;</text:p>
      <text:p text:style-name="P4"><text:s text:c="10"/>$monitor("time=%0t , i=%0d , coeff=%0d , power=%0d , peakpower=%0d", </text:p>
      <text:p text:style-name="P4"><text:s text:c="16"/>$time, dut1.i, COEFF_tb1, power_tb1, max_power1);</text:p>
      <text:p text:style-name="P4"><text:s text:c="3"/>#50000; <text:s/></text:p>
      <text:p text:style-name="P4">case(maxcoeff1) </text:p>
      <text:p text:style-name="P4"><text:s text:c="4"/>// 16'sd28106 : F = 697;</text:p>
      <text:p text:style-name="P4"><text:s text:c="4"/>// 16'sd27018 : F = 770; </text:p>
      <text:p text:style-name="P4"><text:s text:c="4"/>// 16'sd25330 : F = 852;</text:p>
      <text:p text:style-name="P4"><text:soft-page-break/><text:s text:c="4"/>// 16'sd24126 : F = 941; </text:p>
      <text:p text:style-name="P4"><text:s text:c="4"/>16'sd19478 : begin </text:p>
      <text:p text:style-name="P4"><text:s text:c="8"/>F = 1209;</text:p>
      <text:p text:style-name="P4"><text:s text:c="8"/>k=0;</text:p>
      <text:p text:style-name="P4"><text:s text:c="4"/>end </text:p>
      <text:p text:style-name="P4"/>
      <text:p text:style-name="P4"><text:s text:c="4"/>16'sd16846 : begin</text:p>
      <text:p text:style-name="P4"><text:s text:c="8"/>F = 1336; </text:p>
      <text:p text:style-name="P4"><text:s text:c="8"/>k=1;</text:p>
      <text:p text:style-name="P4"><text:s text:c="4"/>end</text:p>
      <text:p text:style-name="P4"><text:s text:c="4"/>16'sd12490 :begin</text:p>
      <text:p text:style-name="P4"><text:s text:c="8"/>F = 1477;</text:p>
      <text:p text:style-name="P4"><text:s text:c="8"/>k=2;</text:p>
      <text:p text:style-name="P4"><text:s text:c="4"/>end </text:p>
      <text:p text:style-name="P4"><text:s text:c="4"/>16'sd9220 <text:s/>:begin</text:p>
      <text:p text:style-name="P4"><text:s text:c="6"/></text:p>
      <text:p text:style-name="P4"><text:s text:c="2"/>F = 1633;</text:p>
      <text:p text:style-name="P4">k=3;</text:p>
      <text:p text:style-name="P4">end </text:p>
      <text:p text:style-name="P4"><text:s text:c="4"/>default <text:s text:c="3"/>: F = 0;</text:p>
      <text:p text:style-name="P4">endcase</text:p>
      <text:p text:style-name="P4"/>
      <text:p text:style-name="P4"><text:s text:c="8"/>$display("det freq: %0d Hz", F);</text:p>
      <text:p text:style-name="P4"><text:s text:c="8"/>$display("power peak: %0d", max_power1);</text:p>
      <text:p text:style-name="P4"/>
      <text:p text:style-name="P4">$display("key is: %0s", key[j][k]);</text:p>
      <text:p text:style-name="P4"/>
      <text:p text:style-name="P4"/>
      <text:p text:style-name="P4"/>
      <text:p text:style-name="P4"/>
      <text:p text:style-name="P4"/>
      <text:p text:style-name="P4"/>
      <text:p text:style-name="P4"><text:s text:c="8"/>$finish;</text:p>
      <text:p text:style-name="P4"><text:s text:c="4"/></text:p>
      <text:p text:style-name="P4">end</text:p>
      <text:p text:style-name="P4"/>
      <text:p text:style-name="P4"/>
      <text:p text:style-name="P4"/>
      <text:p text:style-name="P4"/>
      <text:p text:style-name="P4"/>
      <text:p text:style-name="P4">endmodule</text:p>
      <text:p text:style-name="P4"/>
      <text:p text:style-name="P5">SINNWAVE.v</text:p>
      <text:p text:style-name="P5"/>
      <text:p text:style-name="P5">module sinwave (</text:p>
      <text:p text:style-name="P5"><text:s text:c="4"/>input <text:s/>wire [6:0] addr,</text:p>
      <text:p text:style-name="P5"><text:s text:c="4"/>output reg signed [15:0] sample</text:p>
      <text:p text:style-name="P5">);</text:p>
      <text:p text:style-name="P5"><text:s text:c="4"/>always @(*) begin</text:p>
      <text:p text:style-name="P5"><text:s text:c="8"/>case (addr)</text:p>
      <text:p text:style-name="P5">7'd0: sample = 16'sd0;</text:p>
      <text:p text:style-name="P5">7'd1: sample = 16'sd24234;</text:p>
      <text:p text:style-name="P5"><text:soft-page-break/>7'd2: sample = 16'sd23492;</text:p>
      <text:p text:style-name="P5">7'd3: sample = 16'sd5711;</text:p>
      <text:p text:style-name="P5">7'd4: sample = -16'sd1629;</text:p>
      <text:p text:style-name="P5">7'd5: sample = 16'sd8565;</text:p>
      <text:p text:style-name="P5">7'd6: sample = 16'sd13843;</text:p>
      <text:p text:style-name="P5">7'd7: sample = -16'sd3353;</text:p>
      <text:p text:style-name="P5">7'd8: sample = -16'sd27635;</text:p>
      <text:p text:style-name="P5">7'd9: sample = -16'sd29997;</text:p>
      <text:p text:style-name="P5">7'd10: sample = -16'sd7655;</text:p>
      <text:p text:style-name="P5">7'd11: sample = 16'sd12140;</text:p>
      <text:p text:style-name="P5">7'd12: sample = 16'sd9732;</text:p>
      <text:p text:style-name="P5">7'd13: sample = -16'sd1344;</text:p>
      <text:p text:style-name="P5">7'd14: sample = 16'sd3318;</text:p>
      <text:p text:style-name="P5">7'd15: sample = 16'sd21558;</text:p>
      <text:p text:style-name="P5">7'd16: sample = 16'sd26423;</text:p>
      <text:p text:style-name="P5">7'd17: sample = 16'sd4996;</text:p>
      <text:p text:style-name="P5">7'd18: sample = -16'sd21374;</text:p>
      <text:p text:style-name="P5">7'd19: sample = -16'sd24908;</text:p>
      <text:p text:style-name="P5">7'd20: sample = -16'sd8248;</text:p>
      <text:p text:style-name="P5">7'd21: sample = 16'sd1576;</text:p>
      <text:p text:style-name="P5">7'd22: sample = -16'sd7232;</text:p>
      <text:p text:style-name="P5">7'd23: sample = -16'sd15011;</text:p>
      <text:p text:style-name="P5">7'd24: sample = -16'sd848;</text:p>
      <text:p text:style-name="P5">7'd25: sample = 16'sd24629;</text:p>
      <text:p text:style-name="P5">7'd26: sample = 16'sd31642;</text:p>
      <text:p text:style-name="P5">7'd27: sample = 16'sd11939;</text:p>
      <text:p text:style-name="P5">7'd28: sample = -16'sd9921;</text:p>
      <text:p text:style-name="P5">7'd29: sample = -16'sd10654;</text:p>
      <text:p text:style-name="P5">7'd30: sample = 16'sd756;</text:p>
      <text:p text:style-name="P5">7'd31: sample = -16'sd1148;</text:p>
      <text:p text:style-name="P5">7'd32: sample = -16'sd19190;</text:p>
      <text:p text:style-name="P5">7'd33: sample = -16'sd27896;</text:p>
      <text:p text:style-name="P5">7'd34: sample = -16'sd9857;</text:p>
      <text:p text:style-name="P5">7'd35: sample = 16'sd17907;</text:p>
      <text:p text:style-name="P5">7'd36: sample = 16'sd25735;</text:p>
      <text:p text:style-name="P5">7'd37: sample = 16'sd10840;</text:p>
      <text:p text:style-name="P5">7'd38: sample = -16'sd1164;</text:p>
      <text:p text:style-name="P5">7'd39: sample = 16'sd5819;</text:p>
      <text:p text:style-name="P5">7'd40: sample = 16'sd15643;</text:p>
      <text:p text:style-name="P5">7'd41: sample = 16'sd4831;</text:p>
      <text:p text:style-name="P5">7'd42: sample = -16'sd21068;</text:p>
      <text:p text:style-name="P5">7'd43: sample = -16'sd32520;</text:p>
      <text:p text:style-name="P5">7'd44: sample = -16'sd16080;</text:p>
      <text:p text:style-name="P5">7'd45: sample = 16'sd7225;</text:p>
      <text:p text:style-name="P5">7'd46: sample = 16'sd11260;</text:p>
      <text:p text:style-name="P5">7'd47: sample = 16'sd85;</text:p>
      <text:p text:style-name="P5">7'd48: sample = -16'sd733;</text:p>
      <text:p text:style-name="P5">7'd49: sample = 16'sd16484;</text:p>
      <text:p text:style-name="P5">7'd50: sample = 16'sd28634;</text:p>
      <text:p text:style-name="P5">7'd51: sample = 16'sd14452;</text:p>
      <text:p text:style-name="P5">7'd52: sample = -16'sd13916;</text:p>
      <text:p text:style-name="P5">7'd53: sample = -16'sd25919;</text:p>
      <text:p text:style-name="P5"><text:soft-page-break/>7'd54: sample = -16'sd13391;</text:p>
      <text:p text:style-name="P5">7'd55: sample = 16'sd391;</text:p>
      <text:p text:style-name="P5">7'd56: sample = -16'sd4407;</text:p>
      <text:p text:style-name="P5">7'd57: sample = -16'sd15758;</text:p>
      <text:p text:style-name="P5">7'd58: sample = -16'sd8494;</text:p>
      <text:p text:style-name="P5">7'd59: sample = 16'sd17058;</text:p>
      <text:p text:style-name="P5">7'd60: sample = 16'sd32601;</text:p>
      <text:p text:style-name="P5">7'd61: sample = 16'sd19954;</text:p>
      <text:p text:style-name="P5">7'd62: sample = -16'sd4110;</text:p>
      <text:p text:style-name="P5">7'd63: sample = -16'sd11487;</text:p>
      <text:p text:style-name="P5">7'd64: sample = -16'sd1117;</text:p>
      <text:p text:style-name="P5">7'd65: sample = 16'sd2275;</text:p>
      <text:p text:style-name="P5">7'd66: sample = -16'sd13541;</text:p>
      <text:p text:style-name="P5">7'd67: sample = -16'sd28637;</text:p>
      <text:p text:style-name="P5">7'd68: sample = -16'sd18661;</text:p>
      <text:p text:style-name="P5">7'd69: sample = 16'sd9502;</text:p>
      <text:p text:style-name="P5">7'd70: sample = 16'sd25425;</text:p>
      <text:p text:style-name="P5">7'd71: sample = 16'sd15804;</text:p>
      <text:p text:style-name="P5">7'd72: sample = 16'sd729;</text:p>
      <text:p text:style-name="P5">7'd73: sample = 16'sd3079;</text:p>
      <text:p text:style-name="P5">7'd74: sample = 16'sd15393;</text:p>
      <text:p text:style-name="P5">7'd75: sample = 16'sd11745;</text:p>
      <text:p text:style-name="P5">7'd76: sample = -16'sd12715;</text:p>
      <text:p text:style-name="P5">7'd77: sample = -16'sd31878;</text:p>
      <text:p text:style-name="P5">7'd78: sample = -16'sd23445;</text:p>
      <text:p text:style-name="P5">7'd79: sample = 16'sd651;</text:p>
      <text:p text:style-name="P5">7'd80: sample = 16'sd11287;</text:p>
      <text:p text:style-name="P5">7'd81: sample = 16'sd2269;</text:p>
      <text:p text:style-name="P5">7'd82: sample = -16'sd3441;</text:p>
      <text:p text:style-name="P5">7'd83: sample = 16'sd10468;</text:p>
      <text:p text:style-name="P5">7'd84: sample = 16'sd27928;</text:p>
      <text:p text:style-name="P5">7'd85: sample = 16'sd22372;</text:p>
      <text:p text:style-name="P5">7'd86: sample = -16'sd4779;</text:p>
      <text:p text:style-name="P5">7'd87: sample = -16'sd24239;</text:p>
      <text:p text:style-name="P5">7'd88: sample = -16'sd17980;</text:p>
      <text:p text:style-name="P5">7'd89: sample = -16'sd2166;</text:p>
      <text:p text:style-name="P5">7'd90: sample = -16'sd1909;</text:p>
      <text:p text:style-name="P5">7'd91: sample = -16'sd14599;</text:p>
      <text:p text:style-name="P5">7'd92: sample = -16'sd14509;</text:p>
      <text:p text:style-name="P5">7'd93: sample = 16'sd8164;</text:p>
      <text:p text:style-name="P5">7'd94: sample = 16'sd30369;</text:p>
      <text:p text:style-name="P5">7'd95: sample = 16'sd26443;</text:p>
      <text:p text:style-name="P5">7'd96: sample = 16'sd3063;</text:p>
      <text:p text:style-name="P5">7'd97: sample = -16'sd10625;</text:p>
      <text:p text:style-name="P5">7'd98: sample = -16'sd3462;</text:p>
      <text:p text:style-name="P5">7'd99: sample = 16'sd4214;</text:p>
      <text:p text:style-name="P5">7'd100: sample = -16'sd7370;</text:p>
      <text:p text:style-name="P5">7'd101: sample = -16'sd26552;</text:p>
      <text:p text:style-name="P5">7'd102: sample = -16'sd25489;</text:p>
      <text:p text:style-name="P5">7'd103: sample = -16'sd127;</text:p>
      <text:p text:style-name="P5">7'd104: sample = 16'sd22367;</text:p>
      <text:p text:style-name="P5">7'd105: sample = 16'sd19823;</text:p>
      <text:p text:style-name="P5"><text:soft-page-break/>7'd106: sample = 16'sd3872;</text:p>
      <text:p text:style-name="P5">7'd107: sample = 16'sd962;</text:p>
      <text:p text:style-name="P5">7'd108: sample = 16'sd13442;</text:p>
      <text:p text:style-name="P5">7'd109: sample = 16'sd16730;</text:p>
      <text:p text:style-name="P5">7'd110: sample = -16'sd3534;</text:p>
      <text:p text:style-name="P5">7'd111: sample = -16'sd28114;</text:p>
      <text:p text:style-name="P5">7'd112: sample = -16'sd28853;</text:p>
      <text:p text:style-name="P5">7'd113: sample = -16'sd6930;</text:p>
      <text:p text:style-name="P5">7'd114: sample = 16'sd9485;</text:p>
      <text:p text:style-name="P5">7'd115: sample = 16'sd4616;</text:p>
      <text:p text:style-name="P5">7'd116: sample = -16'sd4595;</text:p>
      <text:p text:style-name="P5">7'd117: sample = 16'sd4349;</text:p>
      <text:p text:style-name="P5">7'd118: sample = 16'sd24572;</text:p>
      <text:p text:style-name="P5">7'd119: sample = 16'sd27937;</text:p>
      <text:p text:style-name="P5">7'd120: sample = 16'sd5085;</text:p>
      <text:p text:style-name="P5">7'd121: sample = -16'sd19839;</text:p>
      <text:p text:style-name="P5">7'd122: sample = -16'sd21247;</text:p>
      <text:p text:style-name="P5">7'd123: sample = -16'sd5785;</text:p>
      <text:p text:style-name="P5">7'd124: sample = -16'sd291;</text:p>
      <text:p text:style-name="P5">7'd125: sample = -16'sd11999;</text:p>
      <text:p text:style-name="P5">7'd126: sample = -16'sd18371;</text:p>
      <text:p text:style-name="P5">7'd127: sample = -16'sd1046;</text:p>
      <text:p text:style-name="P5"/>
      <text:p text:style-name="P5"/>
      <text:p text:style-name="P5"/>
      <text:p text:style-name="P5"><text:s text:c="12"/>default: sample = 16'sd0;</text:p>
      <text:p text:style-name="P5"><text:s text:c="8"/>endcase</text:p>
      <text:p text:style-name="P5"><text:s text:c="4"/>end</text:p>
      <text:p text:style-name="P5">endmodule</text:p>
      <text:p text:style-name="P5"/>
      <text:p text:style-name="P5">SINWAVE.py</text:p>
      <text:p text:style-name="P5">import math</text:p>
      <text:p text:style-name="P5"/>
      <text:p text:style-name="P5">FS = 8000.0</text:p>
      <text:p text:style-name="P5">FREQ1 = 697.0</text:p>
      <text:p text:style-name="P5">FREQ2 = 1633.0</text:p>
      <text:p text:style-name="P5">AMP = 16383</text:p>
      <text:p text:style-name="P5"/>
      <text:p text:style-name="P5">for n in range(128):</text:p>
      <text:p text:style-name="P5"><text:s text:c="4"/>v = round(</text:p>
      <text:p text:style-name="P5"><text:s text:c="8"/>AMP * math.sin(2 * 3.14* FREQ1 * n / FS) +</text:p>
      <text:p text:style-name="P5"><text:s text:c="8"/>AMP * math.sin(2 * 3.14 * FREQ2 * n / FS)</text:p>
      <text:p text:style-name="P5"><text:s text:c="4"/>)</text:p>
      <text:p text:style-name="P5"/>
      <text:p text:style-name="P5"><text:s text:c="4"/>if v &gt;= 0:</text:p>
      <text:p text:style-name="P5"><text:s text:c="8"/>print(f"7'd{n}: sample = 16'sd{v};")</text:p>
      <text:p text:style-name="P5"><text:s text:c="4"/>else:</text:p>
      <text:p text:style-name="P5">print(f"7'd{n}: sample = -16'sd{abs(v)};")</text:p>
      <text:p text:style-name="P5"/>
      <text:p text:style-name="P5"/>
      <text:p text:style-name="P5"/>
      <text:p text:style-name="P5"/>
      <text:p text:style-name="P5"><text:soft-page-break/></text:p>
      <text:p text:style-name="P5">OUTPUT</text:p>
      <text:p text:style-name="P5"><draw:frame draw:style-name="fr1" draw:name="Image1" text:anchor-type="char" svg:width="17cm" svg:height="7.19cm" draw:z-index="0"><draw:image xlink:href="Pictures/10000000000002B7000001266C50C5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9T14:48:13.286080801</meta:creation-date>
    <dc:date>2026-06-29T15:03:07.787873345</dc:date>
    <meta:editing-duration>PT4M41S</meta:editing-duration>
    <meta:editing-cycles>1</meta:editing-cycles>
    <meta:document-statistic meta:table-count="0" meta:image-count="1" meta:object-count="0" meta:page-count="12" meta:paragraph-count="451" meta:word-count="1491" meta:character-count="10532" meta:non-whitespace-character-count="7956"/>
    <meta:generator>LibreOffice/26.2.2.2$Linux_X86_64 LibreOffice_project/620$Build-2</meta:generator>
  </office:meta>
</office:document-meta>
</file>